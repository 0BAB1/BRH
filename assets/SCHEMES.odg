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53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fo:min-height="2.467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141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281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466cm" fo:min-width="8.196cm" fo:padding-top="0.152cm" fo:padding-bottom="0.152cm" fo:padding-left="0.277cm" fo:padding-right="0.27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56cm" fo:min-width="1.216cm" fo:padding-top="0.14cm" fo:padding-bottom="0.14cm" fo:padding-left="0.265cm" fo:padding-right="0.26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1.466cm" fo:min-width="0cm" fo:padding-top="0.14cm" fo:padding-bottom="0.14cm" fo:padding-left="0.265cm" fo:padding-right="0.265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75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1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52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ash" svg:stroke-width="0.028cm" svg:stroke-color="#000000" draw:marker-start-width="0.243cm" draw:marker-end-width="0.243cm" svg:stroke-opacity="100%" svg:stroke-linecap="butt" draw:opacity="0%" draw:textarea-horizontal-align="justify" draw:textarea-vertical-align="top" draw:auto-grow-height="false" fo:min-height="2.736cm" fo:min-width="1.026cm" fo:padding-top="0.14cm" fo:padding-bottom="0.14cm" fo:padding-left="0.265cm" fo:padding-right="0.265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676cm" fo:padding-top="0.14cm" fo:padding-bottom="0.14cm" fo:padding-left="0.265cm" fo:padding-right="0.26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0.972cm" fo:min-width="0.818cm" fo:padding-top="0.134cm" fo:padding-bottom="0.134cm" fo:padding-left="0.259cm" fo:padding-right="0.259cm" style:writing-mode="lr-tb" loext:decorative="false">
        <style:columns fo:column-count="8" fo:column-gap="9cm">
          <style:column style:rel-width="8191*" fo:start-indent="0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8*" fo:start-indent="4.5cm" fo:end-indent="0cm"/>
        </style:columns>
      </style:graphic-properties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top" fo:padding-top="0.139cm" fo:padding-bottom="0.139cm" fo:padding-left="0.264cm" fo:padding-right="0.264cm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116cm" fo:padding-top="0.14cm" fo:padding-bottom="0.14cm" fo:padding-left="0.265cm" fo:padding-right="0.265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1.091cm" fo:min-width="0.28cm" fo:padding-top="0.134cm" fo:padding-bottom="0.134cm" fo:padding-left="0.259cm" fo:padding-right="0.259cm" loext:decorative="false"/>
    </style:style>
    <style:style style:name="gr4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93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42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551cm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89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7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548cm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053cm" svg:stroke-color="#127622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6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56cm" fo:padding-top="0.142cm" fo:padding-bottom="0.142cm" fo:padding-left="0.267cm" fo:padding-right="0.267cm" loext:decorative="false"/>
    </style:style>
    <style:style style:name="gr6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solid" draw:fill-color="#000000" draw:opacity="0%" draw:textarea-horizontal-align="justify" draw:textarea-vertical-align="middle" draw:auto-grow-height="false" fo:min-height="7.11cm" fo:min-width="0.312cm" fo:padding-top="0.151cm" fo:padding-bottom="0.151cm" fo:padding-left="0.276cm" fo:padding-right="0.276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626cm" fo:min-width="14.586cm" fo:padding-top="0.152cm" fo:padding-bottom="0.152cm" fo:padding-left="0.277cm" fo:padding-right="0.27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676cm" fo:padding-top="0.142cm" fo:padding-bottom="0.142cm" fo:padding-left="0.267cm" fo:padding-right="0.267cm" loext:decorative="false"/>
    </style:style>
    <style:style style:name="gr7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81cm" fo:padding-top="0.142cm" fo:padding-bottom="0.142cm" fo:padding-left="0.267cm" fo:padding-right="0.267cm" loext:decorative="false"/>
    </style:style>
    <style:style style:name="gr74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75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67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7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26cm" style:writing-mode="lr-tb" loext:decorative="false"/>
      <style:paragraph-properties style:writing-mode="lr-tb"/>
    </style:style>
    <style:style style:name="gr78" style:family="graphic" style:parent-style-name="standard">
      <style:graphic-properties draw:fill="solid" draw:fill-color="#dee7e5" draw:textarea-horizontal-align="justify" draw:textarea-vertical-align="middle" draw:auto-grow-height="false" fo:min-height="2.47cm" fo:min-width="2.43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solid" draw:fill-color="#dee6ef" draw:opacity="100%" draw:textarea-horizontal-align="justify" draw:textarea-vertical-align="middle" draw:auto-grow-height="false" fo:min-height="7.11cm" fo:min-width="0.312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46cm" fo:padding-top="0.134cm" fo:padding-bottom="0.134cm" fo:padding-left="0.259cm" fo:padding-right="0.259cm" style:writing-mode="lr-tb" loext:decorative="false"/>
      <style:paragraph-properties style:writing-mode="lr-tb"/>
    </style:style>
    <style:style style:name="gr81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96cm" fo:padding-top="0.134cm" fo:padding-bottom="0.134cm" fo:padding-left="0.259cm" fo:padding-right="0.259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826cm" fo:min-width="15.286cm" fo:padding-top="0.152cm" fo:padding-bottom="0.152cm" fo:padding-left="0.277cm" fo:padding-right="0.277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266cm" fo:min-width="5.956cm" fo:padding-top="0.152cm" fo:padding-bottom="0.152cm" fo:padding-left="0.277cm" fo:padding-right="0.277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middle" draw:auto-grow-height="false" fo:min-height="0.426cm" fo:min-width="1.266cm" fo:padding-top="0.152cm" fo:padding-bottom="0.152cm" fo:padding-left="0.277cm" fo:padding-right="0.277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96" style:family="graphic" style:parent-style-name="objectwithoutfill">
      <style:graphic-properties svg:stroke-width="0.028cm" svg:stroke-color="#ffffff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97" style:family="graphic" style:parent-style-name="objectwithoutfill">
      <style:graphic-properties svg:stroke-width="0.053cm" svg:stroke-color="#ffffff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svg:stroke-color="#ffffff" draw:fill="none" fo:min-height="0.42cm" loext:decorative="false"/>
      <style:paragraph-properties style:writing-mode="lr-tb"/>
    </style:style>
    <style:style style:name="gr99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ffffff" draw:fill="none" fo:min-height="0.551cm" loext:decorative="false"/>
      <style:paragraph-properties style:writing-mode="lr-tb"/>
    </style:style>
    <style:style style:name="gr101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103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 loext:decorative="false"/>
    </style:style>
    <style:style style:name="gr104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cm" fo:min-width="0.676cm" fo:padding-top="0.142cm" fo:padding-bottom="0.142cm" fo:padding-left="0.267cm" fo:padding-right="0.267cm" loext:decorative="false"/>
    </style:style>
    <style:style style:name="gr105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06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0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cm" fo:min-width="0.256cm" fo:padding-top="0.142cm" fo:padding-bottom="0.142cm" fo:padding-left="0.267cm" fo:padding-right="0.267cm" loext:decorative="false"/>
    </style:style>
    <style:style style:name="gr108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ffffff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cm" fo:min-width="0.281cm" fo:padding-top="0.142cm" fo:padding-bottom="0.142cm" fo:padding-left="0.267cm" fo:padding-right="0.267cm" loext:decorative="false"/>
    </style:style>
    <style:style style:name="gr111" style:family="graphic" style:parent-style-name="standard" style:list-style-name="L1">
      <style:graphic-properties svg:stroke-width="0.053cm" svg:stroke-color="#ffffff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svg:stroke-color="#ffffff" draw:fill="none" fo:min-height="0.413cm" loext:decorative="false"/>
      <style:paragraph-properties style:writing-mode="lr-tb"/>
    </style:style>
    <style:style style:name="gr113" style:family="graphic" style:parent-style-name="standard" style:list-style-name="L1">
      <style:graphic-properties svg:stroke-width="0.053cm" svg:stroke-color="#ffffff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14" style:family="graphic" style:parent-style-name="standard">
      <style:graphic-properties svg:stroke-width="0.053cm" svg:stroke-color="#ffffff" draw:marker-start-width="0.279cm" draw:marker-end-width="0.279cm" draw:fill="solid" draw:fill-color="#dee6ef" draw:opacity="100%" draw:textarea-horizontal-align="justify" draw:textarea-vertical-align="middle" draw:auto-grow-height="false" fo:min-height="7.11cm" fo:min-width="0.312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style:paragraph-properties fo:margin-top="0.1cm" fo:margin-bottom="0cm" fo:text-align="center"/>
    </style:style>
    <style:style style:name="P11" style:family="paragraph">
      <loext:graphic-properties draw:fill="none"/>
      <style:paragraph-properties fo:margin-top="0.1cm" fo:margin-bottom="0cm"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127622" loext:opacity="100%" fo:font-size="9pt" style:font-size-asian="9pt" style:font-size-complex="9pt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solid" draw:fill-color="#000000" draw:opacity="0%"/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text-align="center"/>
      <style:text-properties fo:color="#127622" loext:opacity="100%" fo:font-size="7pt" style:font-size-asian="7pt" style:font-size-complex="7pt"/>
    </style:style>
    <style:style style:name="P23" style:family="paragraph">
      <loext:graphic-properties draw:fill="solid" draw:fill-color="#f6f9d4"/>
      <style:paragraph-properties fo:text-align="center" style:writing-mode="lr-tb"/>
      <style:text-properties fo:color="#127622" loext:opacity="100%" fo:font-size="7pt" style:font-size-asian="7pt" style:font-size-complex="7pt"/>
    </style:style>
    <style:style style:name="P24" style:family="paragraph"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25" style:family="paragraph">
      <loext:graphic-properties draw:fill="solid" draw:fill-color="#f6f9d4"/>
      <style:paragraph-properties fo:margin-top="0.42cm" fo:margin-bottom="0.35cm" fo:text-align="center" style:writing-mode="lr-tb"/>
      <style:text-properties fo:color="#127622" loext:opacity="100%" fo:font-size="10pt" style:font-size-asian="10pt" style:font-size-complex="10pt"/>
    </style:style>
    <style:style style:name="P26" style:family="paragraph">
      <loext:graphic-properties draw:fill="solid" draw:fill-color="#dee7e5"/>
      <style:paragraph-properties fo:text-align="center" style:writing-mode="lr-tb"/>
      <style:text-properties fo:color="#127622" loext:opacity="100%" fo:font-size="7pt" style:font-size-asian="7pt" style:font-size-complex="7pt"/>
    </style:style>
    <style:style style:name="P27" style:family="paragraph">
      <loext:graphic-properties draw:fill="solid" draw:fill-color="#dee6ef" draw:opacity="100%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style:paragraph-properties fo:text-align="center"/>
      <style:text-properties fo:font-size="9pt" style:font-size-asian="6pt" style:font-size-complex="6pt"/>
    </style:style>
    <style:style style:name="P29" style:family="paragraph">
      <loext:graphic-properties draw:fill="solid" draw:fill-color="#dee6ef" draw:opacity="100%"/>
      <style:paragraph-properties fo:text-align="center" style:writing-mode="lr-tb"/>
      <style:text-properties fo:font-size="9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28pt" style:font-size-complex="28pt"/>
    </style:style>
    <style:style style:name="P31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28pt" style:font-size-complex="2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2pt" style:font-size-complex="12pt"/>
    </style:style>
    <style:style style:name="P3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2pt" style:font-size-complex="12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/>
    </style:style>
    <style:style style:name="P35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/>
    </style:style>
    <style:style style:name="P36" style:family="paragraph">
      <loext:graphic-properties draw:fill="none"/>
      <style:paragraph-properties fo:text-align="center"/>
      <style:text-properties fo:color="#ffffff" loext:opacity="100%"/>
    </style:style>
    <style:style style:name="P37" style:family="paragraph">
      <style:paragraph-properties fo:text-align="center"/>
      <style:text-properties fo:color="#ffffff" loext:opacity="100%"/>
    </style:style>
    <style:style style:name="P38" style:family="paragraph">
      <loext:graphic-properties draw:fill="none"/>
      <style:paragraph-properties fo:text-align="center"/>
      <style:text-properties fo:color="#ffffff" loext:opacity="100%" fo:font-size="9pt" style:font-size-asian="9pt" style:font-size-complex="9pt"/>
    </style:style>
    <style:style style:name="P39" style:family="paragraph">
      <loext:graphic-properties draw:fill="solid" draw:fill-color="#000000"/>
      <style:paragraph-properties fo:text-align="center"/>
      <style:text-properties fo:color="#ffffff" loext:opacity="100%"/>
    </style:style>
    <style:style style:name="P40" style:family="paragraph">
      <loext:graphic-properties draw:opacity="0%"/>
      <style:paragraph-properties fo:text-align="center"/>
      <style:text-properties fo:color="#ffffff" loext:opacity="100%"/>
    </style:style>
    <style:style style:name="P41" style:family="paragraph">
      <style:paragraph-properties fo:text-align="center"/>
      <style:text-properties fo:color="#ffffff" loext:opacity="100%"/>
    </style:style>
    <style:style style:name="P4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/>
    </style:style>
    <style:style style:name="P43" style:family="paragraph">
      <style:text-properties fo:color="#ffffff" loext:opacity="100%"/>
    </style:style>
    <style:style style:name="P44" style:family="paragraph">
      <loext:graphic-properties draw:fill="none"/>
      <style:text-properties fo:color="#ffffff" loext:opacity="100%" fo:font-size="18pt"/>
    </style:style>
    <style:style style:name="P45" style:family="paragraph">
      <style:paragraph-properties fo:text-align="center"/>
      <style:text-properties fo:color="#ffffff" loext:opacity="100%" fo:font-size="9pt" style:font-size-asian="9pt" style:font-size-complex="9pt"/>
    </style:style>
    <style:style style:name="P46" style:family="paragraph">
      <loext:graphic-properties draw:fill="solid" draw:fill-color="#dee6ef" draw:opacity="100%"/>
      <style:paragraph-properties fo:text-align="center" style:writing-mode="lr-tb"/>
      <style:text-properties fo:color="#ffffff" loext:opacity="100%"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2.90000009536743pt" style:font-size-asian="2.90000009536743pt" style:font-size-complex="2.90000009536743pt"/>
    </style:style>
    <style:style style:name="T7" style:family="text">
      <style:text-properties fo:font-size="5.40000009536743pt" style:font-size-asian="5.40000009536743pt" style:font-size-complex="5.40000009536743pt"/>
    </style:style>
    <style:style style:name="T8" style:family="text">
      <style:text-properties fo:color="#127622" loext:opacity="100%"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127622" loext:opacity="100%" fo:font-size="4pt" style:font-size-asian="4pt" style:font-size-complex="4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9.36cm" svg:y="5.03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8" draw:layer="layout" svg:width="4.31cm" svg:height="1.203cm" svg:x="12.75cm" svg:y="5.017cm">
          <draw:text-box>
            <text:p><text:span text:style-name="T2">(FABRIC CLK DOMAIN 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97cm">
          <draw:text-box>
            <text:p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8" draw:layer="layout" svg:width="1.14cm" svg:height="0.391cm" draw:transform="rotate (1.5707963267949) translate (13.79cm 8.41cm)">
          <draw:text-box>
            <text:p><text:span text:style-name="T4">MSG_VAL</text:span></text:p>
          </draw:text-box>
        </draw:frame>
        <draw:frame draw:style-name="gr30" draw:text-style-name="P8" draw:layer="layout" svg:width="1.65cm" svg:height="0.531cm" draw:transform="rotate (1.5707963267949) translate (14.129cm 8.54cm)">
          <draw:text-box>
            <text:p><text:span text:style-name="T4">MSG_PAYLOAD</text:span></text:p>
          </draw:text-box>
        </draw:frame>
      </draw:page>
      <draw:page draw:name="page3" draw:style-name="dp1" draw:master-page-name="Standard">
        <draw:custom-shape draw:style-name="gr31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5cm" svg:height="7.77cm" svg:x="7.17cm" svg:y="4.38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33" draw:text-style-name="P2" draw:layer="layout" svg:width="1.77cm" svg:height="0.66cm" draw:transform="rotate (-1.5707963267949) translate (8.39cm 5.95cm)">
          <text:p text:style-name="P5"><text:span text:style-name="T1">I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0.54cm" svg:height="1.77cm" svg:x="7.18cm" svg:y="5.95cm">
          <text:p text:style-name="P5"><text:span text:style-name="T2">IDELAY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35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36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Ethernet</text:span></text:p>
          </draw:text-box>
        </draw:frame>
        <draw:custom-shape draw:style-name="gr36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37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8cm">
          <draw:text-box>
            <text:p><text:span text:style-name="T4">GAP ERROR</text:span></text:p>
          </draw:text-box>
        </draw:frame>
        <draw:custom-shape draw:style-name="gr38" draw:text-style-name="P2" draw:layer="layout" svg:width="1.58cm" svg:height="3.04cm" svg:x="13.71cm" svg:y="8.53cm">
          <text:p text:style-name="P5"><text:span text:style-name="T5">ITCH PARSER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4.495cm" svg:y1="8.53cm" svg:x2="14.495cm" svg:y2="7.29cm">
          <text:p/>
        </draw:line>
        <draw:custom-shape draw:style-name="gr40" draw:text-style-name="P2" draw:layer="layout" svg:width="2.23cm" svg:height="2.55cm" svg:x="10.34cm" svg:y="8.92cm">
          <text:p text:style-name="P5"><text:span text:style-name="T5">ORDERS[ ref ]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66cm" svg:height="1.54cm" svg:x="10.62cm" svg:y="9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2" draw:text-style-name="P11" draw:layer="layout" svg:x1="12.57cm" svg:y1="9.85cm" svg:x2="13.72cm" svg:y2="9.85cm">
          <text:p text:style-name="P10"><text:span text:style-name="T6">REF (address)</text:span></text:p>
        </draw:line>
        <draw:line draw:style-name="gr42" draw:text-style-name="P11" draw:layer="layout" svg:x1="12.56cm" svg:y1="10.06cm" svg:x2="13.71cm" svg:y2="10.06cm">
          <text:p text:style-name="P10"><text:span text:style-name="T6">Action type</text:span></text:p>
        </draw:line>
        <draw:line draw:style-name="gr42" draw:text-style-name="P11" draw:layer="layout" svg:x1="12.56cm" svg:y1="10.26cm" svg:x2="13.71cm" svg:y2="10.26cm">
          <text:p text:style-name="P10"><text:span text:style-name="T6">Fields (side, price, qty)</text:span></text:p>
        </draw:line>
        <draw:custom-shape draw:style-name="gr43" draw:text-style-name="P2" draw:layer="layout" svg:width="1.67cm" svg:height="2.55cm" svg:x="7.67cm" svg:y="8.9cm">
          <text:p text:style-name="P5"><text:span text:style-name="T7">Ladder [ price ]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2cm" svg:height="1.34cm" svg:x="8.01cm" svg:y="9.7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2" draw:text-style-name="P11" draw:layer="layout" svg:x1="9.319cm" svg:y1="9.845cm" svg:x2="10.33cm" svg:y2="9.845cm">
          <text:p text:style-name="P10"><text:span text:style-name="T6">Price (address)</text:span></text:p>
        </draw:line>
        <draw:line draw:style-name="gr42" draw:text-style-name="P11" draw:layer="layout" svg:x1="9.34cm" svg:y1="10.029cm" svg:x2="10.321cm" svg:y2="10.029cm">
          <text:p text:style-name="P10"><text:span text:style-name="T6">Add/Remove</text:span></text:p>
        </draw:line>
        <draw:line draw:style-name="gr42" draw:text-style-name="P11" draw:layer="layout" svg:x1="9.36cm" svg:y1="10.205cm" svg:x2="10.32cm" svg:y2="10.205cm">
          <text:p text:style-name="P10"><text:span text:style-name="T6">qty</text:span></text:p>
        </draw:line>
        <draw:line draw:style-name="gr42" draw:text-style-name="P11" draw:layer="layout" svg:x1="12.57cm" svg:y1="9.597cm" svg:x2="13.72cm" svg:y2="9.597cm">
          <text:p text:style-name="P10"><text:span text:style-name="T6">Valid</text:span></text:p>
        </draw:line>
        <draw:line draw:style-name="gr42" draw:text-style-name="P11" draw:layer="layout" svg:x1="9.36cm" svg:y1="9.656cm" svg:x2="10.32cm" svg:y2="9.656cm">
          <text:p text:style-name="P10"><text:span text:style-name="T6">Valid</text:span></text:p>
        </draw:line>
      </draw:page>
      <draw:page draw:name="page4" draw:style-name="dp1" draw:master-page-name="Standard">
        <draw:custom-shape draw:style-name="gr45" draw:text-style-name="P3" draw:layer="layout" svg:width="0.89cm" svg:height="9.24cm" svg:x="12.43cm" svg:y="3.0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9cm" svg:height="5.53cm" svg:x="16.88cm" svg:y="4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4.33cm" svg:x2="2.47cm" svg:y2="4.33cm">
          <text:p/>
        </draw:line>
        <draw:line draw:style-name="gr26" draw:text-style-name="P4" draw:layer="layout" svg:x1="4cm" svg:y1="5.43cm" svg:x2="2.47cm" svg:y2="5.43cm">
          <text:p/>
        </draw:line>
        <draw:line draw:style-name="gr26" draw:text-style-name="P4" draw:layer="layout" svg:x1="4cm" svg:y1="6.63cm" svg:x2="2.47cm" svg:y2="6.63cm">
          <text:p/>
        </draw:line>
        <draw:line draw:style-name="gr26" draw:text-style-name="P4" draw:layer="layout" svg:x1="12.44cm" svg:y1="11.23cm" svg:x2="2.47cm" svg:y2="11.23cm">
          <text:p/>
        </draw:line>
        <draw:frame draw:style-name="gr47" draw:text-style-name="P13" draw:layer="layout" svg:width="1.54cm" svg:height="0.67cm" svg:x="2.15cm" svg:y="3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1.85cm" svg:y="4.98cm">
          <draw:text-box>
            <text:p text:style-name="P5"><text:span text:style-name="T5">REF</text:span></text:p>
          </draw:text-box>
        </draw:frame>
        <draw:frame draw:style-name="gr48" draw:text-style-name="P13" draw:layer="layout" svg:width="1.63cm" svg:height="0.801cm" svg:x="2.35cm" svg:y="6.08cm">
          <draw:text-box>
            <text:p text:style-name="P5"><text:span text:style-name="T5">NEWREF</text:span></text:p>
          </draw:text-box>
        </draw:frame>
        <draw:line draw:style-name="gr26" draw:text-style-name="P4" draw:layer="layout" svg:x1="15.86cm" svg:y1="4.33cm" svg:x2="13.31cm" svg:y2="4.33cm">
          <text:p/>
        </draw:line>
        <draw:line draw:style-name="gr26" draw:text-style-name="P4" draw:layer="layout" svg:x1="15.86cm" svg:y1="4.33cm" svg:x2="15.86cm" svg:y2="5.81cm">
          <text:p/>
        </draw:line>
        <draw:line draw:style-name="gr26" draw:text-style-name="P4" draw:layer="layout" svg:x1="16.87cm" svg:y1="5.81cm" svg:x2="15.86cm" svg:y2="5.81cm">
          <text:p/>
        </draw:line>
        <draw:custom-shape draw:style-name="gr49" draw:text-style-name="P3" draw:layer="layout" svg:width="0.89cm" svg:height="9.2cm" svg:x="1.59cm" svg:y="3.0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2.15cm" svg:y="10.669cm">
          <draw:text-box>
            <text:p text:style-name="P5"><text:span text:style-name="T5">Q/P/B</text:span></text:p>
          </draw:text-box>
        </draw:frame>
        <draw:frame draw:style-name="gr48" draw:text-style-name="P13" draw:layer="layout" svg:width="1.63cm" svg:height="0.801cm" svg:x="2.35cm" svg:y="6.081cm">
          <draw:text-box>
            <text:p text:style-name="P5"><text:span text:style-name="T5">NEWREF</text:span></text:p>
          </draw:text-box>
        </draw:frame>
        <draw:frame draw:style-name="gr47" draw:text-style-name="P13" draw:layer="layout" svg:width="1.54cm" svg:height="0.67cm" svg:x="16.54cm" svg:y="5.53cm">
          <draw:text-box>
            <text:p text:style-name="P5"><text:span text:style-name="T5">WE</text:span></text:p>
          </draw:text-box>
        </draw:frame>
        <draw:custom-shape draw:style-name="gr50" draw:text-style-name="P3" draw:layer="layout" svg:width="2.21cm" svg:height="1.12cm" draw:transform="rotate (1.5707963267949) translate (3.98cm 7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5.42cm" svg:x2="5.1cm" svg:y2="5.42cm">
          <text:p/>
        </draw:line>
        <draw:frame draw:style-name="gr47" draw:text-style-name="P13" draw:layer="layout" svg:width="2cm" svg:height="0.67cm" svg:x="4.34cm" svg:y="4.95cm">
          <draw:text-box>
            <text:p text:style-name="P5"><text:span text:style-name="T5">A</text:span></text:p>
          </draw:text-box>
        </draw:frame>
        <draw:line draw:style-name="gr26" draw:text-style-name="P4" draw:layer="layout" svg:x1="25.04cm" svg:y1="4.34cm" svg:x2="15.86cm" svg:y2="4.34cm">
          <text:p/>
        </draw:line>
        <draw:frame draw:style-name="gr47" draw:text-style-name="P13" draw:layer="layout" svg:width="1.54cm" svg:height="0.67cm" svg:x="23.72cm" svg:y="3.73cm">
          <draw:text-box>
            <text:p text:style-name="P5"><text:span text:style-name="T5">VALID</text:span></text:p>
          </draw:text-box>
        </draw:frame>
        <draw:line draw:style-name="gr26" draw:text-style-name="P4" draw:layer="layout" svg:x1="15.16cm" svg:y1="5.45cm" svg:x2="13.34cm" svg:y2="5.45cm">
          <text:p/>
        </draw:line>
        <draw:line draw:style-name="gr26" draw:text-style-name="P4" draw:layer="layout" svg:x1="15.16cm" svg:y1="5.43cm" svg:x2="15.16cm" svg:y2="6.91cm">
          <text:p/>
        </draw:line>
        <draw:line draw:style-name="gr26" draw:text-style-name="P4" draw:layer="layout" svg:x1="16.9cm" svg:y1="6.9cm" svg:x2="15.15cm" svg:y2="6.9cm">
          <text:p/>
        </draw:line>
        <draw:frame draw:style-name="gr47" draw:text-style-name="P13" draw:layer="layout" svg:width="1.54cm" svg:height="0.67cm" svg:x="16.65cm" svg:y="6.63cm">
          <draw:text-box>
            <text:p text:style-name="P5"><text:span text:style-name="T5">ADDR</text:span></text:p>
          </draw:text-box>
        </draw:frame>
        <draw:line draw:style-name="gr26" draw:text-style-name="P4" draw:layer="layout" svg:x1="25.06cm" svg:y1="11.26cm" svg:x2="13.35cm" svg:y2="11.26cm">
          <text:p/>
        </draw:line>
        <draw:frame draw:style-name="gr47" draw:text-style-name="P13" draw:layer="layout" svg:width="1.54cm" svg:height="0.67cm" svg:x="23.8cm" svg:y="10.73cm">
          <draw:text-box>
            <text:p text:style-name="P5"><text:span text:style-name="T5">Q/P/B</text:span></text:p>
          </draw:text-box>
        </draw:frame>
      </draw:page>
      <draw:page draw:name="page5" draw:style-name="dp1" draw:master-page-name="Standard">
        <draw:custom-shape draw:style-name="gr51" draw:text-style-name="P3" draw:layer="layout" svg:width="0.89cm" svg:height="11.33cm" svg:x="15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.9cm" svg:height="5.53cm" svg:x="22.48cm" svg:y="6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5.04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5"><text:span text:style-name="T5">REF</text:span></text:p>
          </draw:text-box>
        </draw:frame>
        <draw:line draw:style-name="gr26" draw:text-style-name="P4" draw:layer="layout" svg:x1="18.47cm" svg:y1="6.34cm" svg:x2="15.92cm" svg:y2="6.34cm">
          <text:p/>
        </draw:lin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53" draw:text-style-name="P3" draw:layer="layout" svg:width="0.89cm" svg:height="11.33cm" svg:x="4.19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5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5"><text:span text:style-name="T5">WE</text:span></text:p>
          </draw:text-box>
        </draw:frame>
        <draw:custom-shape draw:style-name="gr54" draw:text-style-name="P3" draw:layer="layout" svg:width="2.21cm" svg:height="1.12cm" draw:transform="rotate (1.5707963267949) translate (6.58cm 9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5"><text:span text:style-name="T5">A</text:span></text:p>
          </draw:text-box>
        </draw:frame>
        <draw:line draw:style-name="gr26" draw:text-style-name="P4" draw:layer="layout" svg:x1="28.01cm" svg:y1="6.34cm" svg:x2="18.46cm" svg:y2="6.34cm">
          <text:p/>
        </draw:line>
        <draw:frame draw:style-name="gr47" draw:text-style-name="P13" draw:layer="layout" svg:width="1.54cm" svg:height="0.67cm" svg:x="26.12cm" svg:y="5.83cm">
          <draw:text-box>
            <text:p text:style-name="P5"><text:span text:style-name="T5">VALID</text:span></text:p>
          </draw:text-box>
        </draw:frame>
        <draw:line draw:style-name="gr26" draw:text-style-name="P4" draw:layer="layout" svg:x1="17.76cm" svg:y1="7.45cm" svg:x2="15.94cm" svg:y2="7.45cm">
          <text:p/>
        </draw:lin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5"><text:span text:style-name="T5">ADDR</text:span></text:p>
          </draw:text-box>
        </draw:frame>
        <draw:line draw:style-name="gr23" draw:text-style-name="P4" draw:layer="layout" svg:x1="25.96cm" svg:y1="13.26cm" svg:x2="15.95cm" svg:y2="13.26cm">
          <text:p/>
        </draw:line>
        <draw:frame draw:style-name="gr47" draw:text-style-name="P13" draw:layer="layout" svg:width="1.54cm" svg:height="0.67cm" svg:x="26.11cm" svg:y="12.69cm">
          <draw:text-box>
            <text:p text:style-name="P5"><text:span text:style-name="T5">Q/P</text:span></text:p>
          </draw:text-box>
        </draw:frame>
        <draw:custom-shape draw:style-name="gr55" draw:text-style-name="P3" draw:layer="layout" svg:width="2.9cm" svg:height="4.2cm" svg:x="10.37cm" svg:y="8cm">
          <text:p text:style-name="P1"><text:span text:style-name="T1">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5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5"><text:span text:style-name="T5">ADDR</text:span></text:p>
          </draw:text-box>
        </draw:frame>
        <draw:line draw:style-name="gr23" draw:text-style-name="P4" draw:layer="layout" svg:x1="15cm" svg:y1="11.19cm" svg:x2="13.27cm" svg:y2="11.19cm">
          <text:p/>
        </draw:line>
        <draw:frame draw:style-name="gr48" draw:text-style-name="P13" draw:layer="layout" svg:width="1.63cm" svg:height="0.801cm" svg:x="12.98cm" svg:y="10.669cm">
          <draw:text-box>
            <text:p text:style-name="P5"><text:span text:style-name="T5">Q/P/B</text:span></text:p>
          </draw:text-box>
        </draw:frame>
        <draw:line draw:style-name="gr23" draw:text-style-name="P4" draw:layer="layout" svg:x1="16.84cm" svg:y1="11.19cm" svg:x2="15.9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5.96cm" svg:y2="12.568cm">
          <text:p/>
        </draw:line>
        <draw:custom-shape draw:style-name="gr57" draw:text-style-name="P12" draw:layer="layout" svg:width="1.93cm" svg:height="0.46cm" draw:transform="rotate (1.5707963267949) translate (25.96cm 14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8.03cm" svg:y1="13.2cm" svg:x2="26.44cm" svg:y2="13.2cm">
          <text:p/>
        </draw:line>
        <draw:line draw:style-name="gr58" draw:text-style-name="P4" draw:layer="layout" svg:x1="15cm" svg:y1="14.73cm" svg:x2="5.07cm" svg:y2="14.73cm">
          <text:p/>
        </draw:line>
        <draw:line draw:style-name="gr58" draw:text-style-name="P4" draw:layer="layout" svg:x1="28.04cm" svg:y1="14.73cm" svg:x2="15.96cm" svg:y2="14.73cm">
          <text:p/>
        </draw:line>
        <draw:line draw:style-name="gr58" draw:text-style-name="P4" draw:layer="layout" svg:x1="26.22cm" svg:y1="14.73cm" svg:x2="26.22cm" svg:y2="13.88cm">
          <text:p/>
        </draw:line>
        <draw:frame draw:style-name="gr48" draw:text-style-name="P15" draw:layer="layout" svg:width="1.63cm" svg:height="0.801cm" svg:x="5.01cm" svg:y="14.179cm">
          <draw:text-box>
            <text:p text:style-name="P5"><text:span text:style-name="T8">OP CODE</text:span></text:p>
          </draw:text-box>
        </draw:frame>
        <draw:frame draw:style-name="gr48" draw:text-style-name="P15" draw:layer="layout" svg:width="1.63cm" svg:height="0.801cm" svg:x="15.88cm" svg:y="14.18cm">
          <draw:text-box>
            <text:p text:style-name="P5"><text:span text:style-name="T8">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5"><text:span text:style-name="T5">DATA</text:span></text:p>
          </draw:text-box>
        </draw:frame>
        <draw:line draw:style-name="gr58" draw:text-style-name="P4" draw:layer="layout" svg:x1="15.014cm" svg:y1="5.431cm" svg:x2="5.084cm" svg:y2="5.431cm">
          <text:p/>
        </draw:line>
        <draw:frame draw:style-name="gr48" draw:text-style-name="P15" draw:layer="layout" svg:width="1.63cm" svg:height="0.801cm" svg:x="5.024cm" svg:y="4.88cm">
          <draw:text-box>
            <text:p text:style-name="P5"><text:span text:style-name="T8">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5" draw:layer="layout" svg:width="2.53cm" svg:height="0.801cm" svg:x="25.8cm" svg:y="14.259cm">
          <draw:text-box>
            <text:p text:style-name="P5"><text:span text:style-name="T8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5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custom-shape draw:style-name="gr56" draw:text-style-name="P14" draw:layer="layout" svg:width="0.18cm" svg:height="0.18cm" svg:x="20.3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434cm" svg:y1="10.7cm" svg:x2="20.425cm" svg:y2="13.91cm">
          <text:p/>
        </draw:line>
        <draw:line draw:style-name="gr23" draw:text-style-name="P4" draw:layer="layout" svg:x1="25.94cm" svg:y1="13.91cm" svg:x2="20.426cm" svg:y2="13.91cm">
          <text:p/>
        </draw:line>
        <draw:custom-shape draw:style-name="gr62" draw:text-style-name="P3" draw:layer="layout" svg:width="0.89cm" svg:height="11.33cm" svg:x="28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.89cm" svg:y1="5.431cm" svg:x2="0.484cm" svg:y2="5.431cm">
          <text:p/>
        </draw:line>
        <draw:frame draw:style-name="gr48" draw:text-style-name="P15" draw:layer="layout" svg:width="1.45cm" svg:height="0.801cm" svg:x="0.26cm" svg:y="4.539cm">
          <draw:text-box>
            <text:p text:style-name="P5"><text:span text:style-name="T8">OP CODE</text:span></text:p>
          </draw:text-box>
        </draw:frame>
        <draw:custom-shape draw:style-name="gr63" draw:text-style-name="P17" draw:layer="layout" svg:width="1.22cm" svg:height="10.48cm" svg:x="1.63cm" svg:y="4.46cm">
          <text:p text:style-name="P16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5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5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5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5"><text:span text:style-name="T5">Q/P/B</text:span></text:p>
          </draw:text-box>
        </draw:frame>
        <draw:line draw:style-name="gr64" draw:text-style-name="P5" draw:layer="layout" svg:x1="11.9cm" svg:y1="8.03cm" svg:x2="11.9cm" svg:y2="3.4cm">
          <text:p/>
        </draw:line>
        <draw:line draw:style-name="gr64" draw:text-style-name="P5" draw:layer="layout" svg:x1="23.9cm" svg:y1="6.64cm" svg:x2="23.9cm" svg:y2="3.4cm">
          <text:p/>
        </draw:line>
        <draw:custom-shape draw:style-name="gr65" draw:text-style-name="P3" draw:layer="layout" svg:width="15.14cm" svg:height="0.93cm" svg:x="9.99cm" svg:y="2.48cm">
          <text:p text:style-name="P1"><text:span text:style-name="T1">ARBITRER → AXI LITE FIFO → AXI RAM CONTROLLER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7.76cm" svg:y1="2.48cm" svg:x2="17.76cm" svg:y2="1cm">
          <text:p/>
        </draw:line>
      </draw:page>
      <draw:page draw:name="page6" draw:style-name="dp1" draw:master-page-name="Standard">
        <draw:custom-shape draw:style-name="gr66" draw:text-style-name="P19" draw:layer="layout" svg:width="2.9cm" svg:height="5.53cm" svg:x="22.48cm" svg:y="6.64cm">
          <text:p text:style-name="P18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1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1.33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5"><text:span text:style-name="T5">REF</text:span></text:p>
          </draw:text-box>
        </draw:fram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67" draw:text-style-name="P19" draw:layer="layout" svg:width="0.89cm" svg:height="11.33cm" svg:x="4.19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5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5"><text:span text:style-name="T5">WE</text:span></text:p>
          </draw:text-box>
        </draw:frame>
        <draw:custom-shape draw:style-name="gr68" draw:text-style-name="P19" draw:layer="layout" svg:width="1.63cm" svg:height="1.12cm" draw:transform="rotate (1.5707963267949) translate (6.58cm 8.2cm)">
          <text:p text:style-name="P18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3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5"><text:span text:style-name="T5">A</text:span></text:p>
          </draw:text-box>
        </draw:frame>
        <draw:frame draw:style-name="gr47" draw:text-style-name="P13" draw:layer="layout" svg:width="1.54cm" svg:height="0.67cm" svg:x="27.92cm" svg:y="5.83cm">
          <draw:text-box>
            <text:p text:style-name="P5"><text:span text:style-name="T5">VALID</text:span></text:p>
          </draw:text-box>
        </draw:fram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5"><text:span text:style-name="T5">ADDR</text:span></text:p>
          </draw:text-box>
        </draw:frame>
        <draw:line draw:style-name="gr23" draw:text-style-name="P4" draw:layer="layout" svg:x1="27.76cm" svg:y1="13.26cm" svg:x2="12.26cm" svg:y2="13.26cm">
          <text:p/>
        </draw:line>
        <draw:frame draw:style-name="gr47" draw:text-style-name="P13" draw:layer="layout" svg:width="1.54cm" svg:height="0.67cm" svg:x="27.91cm" svg:y="12.39cm">
          <draw:text-box>
            <text:p text:style-name="P5"><text:span text:style-name="T5">Q/P</text:span></text:p>
          </draw:text-box>
        </draw:frame>
        <draw:custom-shape draw:style-name="gr69" draw:text-style-name="P19" draw:layer="layout" svg:width="2.9cm" svg:height="4.2cm" svg:x="10.37cm" svg:y="8cm">
          <text:p text:style-name="P18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5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5"><text:span text:style-name="T5">ADDR</text:span></text:p>
          </draw:text-box>
        </draw:frame>
        <draw:line draw:style-name="gr23" draw:text-style-name="P4" draw:layer="layout" svg:x1="14.18cm" svg:y1="11.193cm" svg:x2="13.27cm" svg:y2="11.19cm">
          <text:p/>
        </draw:line>
        <draw:frame draw:style-name="gr48" draw:text-style-name="P13" draw:layer="layout" svg:width="2.168cm" svg:height="0.801cm" svg:x="12.592cm" svg:y="11.23cm">
          <draw:text-box>
            <text:p text:style-name="P5"><text:span text:style-name="T5">Q/P/B</text:span></text:p>
          </draw:text-box>
        </draw:frame>
        <draw:line draw:style-name="gr23" draw:text-style-name="P4" draw:layer="layout" svg:x1="16.84cm" svg:y1="11.19cm" svg:x2="16.2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7.76cm" svg:y2="12.569cm">
          <text:p/>
        </draw:line>
        <draw:custom-shape draw:style-name="gr70" draw:text-style-name="P12" draw:layer="layout" svg:width="2.16cm" svg:height="0.46cm" draw:transform="rotate (1.5707963267949) translate (27.76cm 14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9.18cm" svg:y1="13cm" svg:x2="28.24cm" svg:y2="13cm">
          <text:p/>
        </draw:line>
        <draw:line draw:style-name="gr58" draw:text-style-name="P4" draw:layer="layout" svg:x1="11.35cm" svg:y1="14.73cm" svg:x2="5.07cm" svg:y2="14.73cm">
          <text:p/>
        </draw:line>
        <draw:line draw:style-name="gr58" draw:text-style-name="P4" draw:layer="layout" svg:x1="29.46cm" svg:y1="14.73cm" svg:x2="15.96cm" svg:y2="14.73cm">
          <text:p/>
        </draw:line>
        <draw:line draw:style-name="gr58" draw:text-style-name="P4" draw:layer="layout" svg:x1="28.02cm" svg:y1="14.73cm" svg:x2="28.02cm" svg:y2="14.1cm">
          <text:p/>
        </draw:line>
        <draw:frame draw:style-name="gr48" draw:text-style-name="P15" draw:layer="layout" svg:width="2.47cm" svg:height="0.801cm" svg:x="5.01cm" svg:y="14.179cm">
          <draw:text-box>
            <text:p text:style-name="P5"><text:span text:style-name="T8">MICRPOP CODE</text:span></text:p>
          </draw:text-box>
        </draw:frame>
        <draw:frame draw:style-name="gr48" draw:text-style-name="P15" draw:layer="layout" svg:width="2.8cm" svg:height="0.801cm" svg:x="15.49cm" svg:y="14.79cm">
          <draw:text-box>
            <text:p text:style-name="P5"><text:span text:style-name="T8">MICRO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5"><text:span text:style-name="T5">DATA</text:span></text:p>
          </draw:text-box>
        </draw:frame>
        <draw:line draw:style-name="gr58" draw:text-style-name="P4" draw:layer="layout" svg:x1="11.35cm" svg:y1="5.431cm" svg:x2="5.084cm" svg:y2="5.431cm">
          <text:p/>
        </draw:line>
        <draw:frame draw:style-name="gr48" draw:text-style-name="P15" draw:layer="layout" svg:width="2.456cm" svg:height="0.801cm" svg:x="5.024cm" svg:y="4.88cm">
          <draw:text-box>
            <text:p text:style-name="P5"><text:span text:style-name="T8">MICRO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5" draw:layer="layout" svg:width="2.53cm" svg:height="0.801cm" svg:x="27.6cm" svg:y="14.259cm">
          <draw:text-box>
            <text:p text:style-name="P5"><text:span text:style-name="T8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5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line draw:style-name="gr58" draw:text-style-name="P4" draw:layer="layout" svg:x1="1.89cm" svg:y1="5.431cm" svg:x2="0.484cm" svg:y2="5.431cm">
          <text:p/>
        </draw:line>
        <draw:frame draw:style-name="gr48" draw:text-style-name="P15" draw:layer="layout" svg:width="1.45cm" svg:height="0.801cm" svg:x="0.26cm" svg:y="4.539cm">
          <draw:text-box>
            <text:p text:style-name="P5"><text:span text:style-name="T8">OP CODE</text:span></text:p>
          </draw:text-box>
        </draw:fram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5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5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5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5"><text:span text:style-name="T5">Q/P/B</text:span></text:p>
          </draw:text-box>
        </draw:frame>
        <draw:custom-shape draw:style-name="gr71" draw:text-style-name="P19" draw:layer="layout" svg:width="0.89cm" svg:height="3.57cm" svg:x="11.33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cm" svg:y1="5.431cm" svg:x2="12.21cm" svg:y2="5.431cm">
          <text:p/>
        </draw:line>
        <draw:line draw:style-name="gr26" draw:text-style-name="P4" draw:layer="layout" svg:x1="17.76cm" svg:y1="7.46cm" svg:x2="12.21cm" svg:y2="7.46cm">
          <text:p/>
        </draw:line>
        <draw:custom-shape draw:style-name="gr72" draw:text-style-name="P19" draw:layer="layout" svg:width="0.89cm" svg:height="3.51cm" svg:x="11.33cm" svg:y="12.21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5.96cm" svg:y1="14.73cm" svg:x2="12.263cm" svg:y2="14.73cm">
          <text:p/>
        </draw:line>
        <draw:line draw:style-name="gr26" draw:text-style-name="P4" draw:layer="layout" svg:x1="29.7cm" svg:y1="6.32cm" svg:x2="12.21cm" svg:y2="6.32cm">
          <text:p/>
        </draw:line>
        <draw:custom-shape draw:style-name="gr73" draw:text-style-name="P12" draw:layer="layout" svg:width="1.453cm" svg:height="0.44cm" draw:transform="rotate (1.5707963267949) translate (15.8cm 11.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14.19cm" svg:y1="11.79cm" svg:x2="14.19cm" svg:y2="10.64cm">
          <text:p/>
        </draw:line>
        <draw:line draw:style-name="gr23" draw:text-style-name="P4" draw:layer="layout" svg:x1="15.8cm" svg:y1="11.659cm" svg:x2="14.16cm" svg:y2="11.656cm">
          <text:p/>
        </draw:line>
        <draw:line draw:style-name="gr23" draw:text-style-name="P4" draw:layer="layout" svg:x1="15.82cm" svg:y1="10.792cm" svg:x2="14.2cm" svg:y2="10.787cm">
          <text:p/>
        </draw:line>
        <draw:custom-shape draw:style-name="gr74" draw:text-style-name="P20" draw:layer="layout" svg:width="0.77cm" svg:height="1.2cm" svg:x="14.47cm" svg:y="10.1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.01cm" svg:y1="14.71cm" svg:x2="16.01cm" svg:y2="11.75cm">
          <text:p/>
        </draw:line>
        <draw:frame draw:style-name="gr6" draw:text-style-name="P21" draw:layer="layout" svg:width="3.869cm" svg:height="0.663cm" svg:x="7.15cm" svg:y="3.87cm">
          <draw:text-box>
            <text:p><text:span text:style-name="T1">PIPELINE 0</text:span></text:p>
          </draw:text-box>
        </draw:frame>
        <draw:frame draw:style-name="gr6" draw:text-style-name="P21" draw:layer="layout" svg:width="3.869cm" svg:height="0.663cm" svg:x="17.55cm" svg:y="3.797cm">
          <draw:text-box>
            <text:p><text:span text:style-name="T1">PIPELINE 1</text:span></text:p>
          </draw:text-box>
        </draw:frame>
        <draw:frame draw:style-name="gr6" draw:text-style-name="P21" draw:layer="layout" svg:width="3.869cm" svg:height="0.663cm" svg:x="27.09cm" svg:y="3.807cm">
          <draw:text-box>
            <text:p><text:span text:style-name="T1">PIPELINE 2</text:span></text:p>
          </draw:text-box>
        </draw:frame>
        <draw:custom-shape draw:style-name="gr75" draw:text-style-name="P23" draw:layer="layout" svg:width="2.17cm" svg:height="1.18cm" svg:x="5.21cm" svg:y="14.86cm">
          <text:p text:style-name="P22"><text:span text:style-name="T8">ADD</text:span><text:span text:style-name="T8"><text:line-break/></text:span><text:span text:style-name="T8">DELETE</text:span><text:span text:style-name="T8"><text:line-break/></text:span><text:span text:style-name="T8">EXEC</text:span><text:span text:style-name="T8"><text:line-break/></text:span><text:span text:style-name="T8">RE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4" draw:layer="layout" svg:x1="27.76cm" svg:y1="14.069cm" svg:x2="15.56cm" svg:y2="14.047cm">
          <text:p/>
        </draw:line>
        <draw:line draw:style-name="gr23" draw:text-style-name="P4" draw:layer="layout" svg:x1="15.56cm" svg:y1="10.79cm" svg:x2="15.56cm" svg:y2="14.06cm">
          <text:p/>
        </draw:line>
        <draw:custom-shape draw:style-name="gr56" draw:text-style-name="P14" draw:layer="layout" svg:width="0.18cm" svg:height="0.18cm" svg:x="15.48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draw:layer="layout" svg:width="0.89cm" svg:height="11.33cm" svg:x="25.96cm" svg:y="4.53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1.76cm" svg:height="1.18cm" svg:x="0.22cm" svg:y="3.27cm">
          <text:p text:style-name="P24"><text:span text:style-name="T10">ADD_ORDER, EXEC_ORDER, DELETE_ORDER, REPLACE_ORDER</text:span></text:p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2.93cm" svg:height="2.72cm" svg:x="0.65cm" svg:y="15.7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1.22cm" svg:height="10.48cm" svg:x="1.63cm" svg:y="4.46cm">
          <text:p text:style-name="P16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9" draw:layer="layout" svg:width="2.07cm" svg:height="0.98cm" svg:x="1cm" svg:y="15.93cm">
          <text:p text:style-name="P28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9" draw:layer="layout" svg:width="2.14cm" svg:height="0.98cm" svg:x="0.94cm" svg:y="17.19cm">
          <text:p text:style-name="P28"><text:span text:style-name="T3">RE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1.33cm" svg:y1="16.81cm" svg:x2="1.28cm" svg:y2="17.37cm">
          <text:p/>
        </draw:line>
        <draw:line draw:style-name="gr82" draw:text-style-name="P4" draw:layer="layout" svg:x1="2.8cm" svg:y1="17.39cm" svg:x2="2.76cm" svg:y2="16.81cm">
          <text:p/>
        </draw:line>
      </draw:page>
      <draw:page draw:name="page7" draw:style-name="dp1" draw:master-page-name="Standard">
        <draw:custom-shape draw:style-name="gr83" draw:text-style-name="P19" draw:layer="layout" svg:width="2.9cm" svg:height="5.53cm" svg:x="22.48cm" svg:y="6.64cm">
          <text:p text:style-name="P18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1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1.33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5"><text:span text:style-name="T5">REF</text:span></text:p>
          </draw:text-box>
        </draw:fram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84" draw:text-style-name="P19" draw:layer="layout" svg:width="0.89cm" svg:height="11.33cm" svg:x="4.19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5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5"><text:span text:style-name="T5">WE</text:span></text:p>
          </draw:text-box>
        </draw:frame>
        <draw:custom-shape draw:style-name="gr85" draw:text-style-name="P19" draw:layer="layout" svg:width="1.63cm" svg:height="1.12cm" draw:transform="rotate (1.5707963267949) translate (6.58cm 8.2cm)">
          <text:p text:style-name="P18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3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5"><text:span text:style-name="T5">A</text:span></text:p>
          </draw:text-box>
        </draw:frame>
        <draw:frame draw:style-name="gr47" draw:text-style-name="P13" draw:layer="layout" svg:width="1.54cm" svg:height="0.67cm" svg:x="27.92cm" svg:y="5.83cm">
          <draw:text-box>
            <text:p text:style-name="P5"><text:span text:style-name="T5">VALID</text:span></text:p>
          </draw:text-box>
        </draw:fram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5"><text:span text:style-name="T5">ADDR</text:span></text:p>
          </draw:text-box>
        </draw:frame>
        <draw:line draw:style-name="gr23" draw:text-style-name="P4" draw:layer="layout" svg:x1="27.76cm" svg:y1="13.26cm" svg:x2="12.26cm" svg:y2="13.26cm">
          <text:p/>
        </draw:line>
        <draw:frame draw:style-name="gr47" draw:text-style-name="P13" draw:layer="layout" svg:width="1.54cm" svg:height="0.67cm" svg:x="27.91cm" svg:y="12.39cm">
          <draw:text-box>
            <text:p text:style-name="P5"><text:span text:style-name="T5">Q/P</text:span></text:p>
          </draw:text-box>
        </draw:frame>
        <draw:custom-shape draw:style-name="gr86" draw:text-style-name="P19" draw:layer="layout" svg:width="2.9cm" svg:height="4.2cm" svg:x="10.37cm" svg:y="8cm">
          <text:p text:style-name="P18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5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5"><text:span text:style-name="T5">ADDR</text:span></text:p>
          </draw:text-box>
        </draw:frame>
        <draw:line draw:style-name="gr23" draw:text-style-name="P4" draw:layer="layout" svg:x1="14.18cm" svg:y1="11.193cm" svg:x2="13.27cm" svg:y2="11.19cm">
          <text:p/>
        </draw:line>
        <draw:frame draw:style-name="gr48" draw:text-style-name="P13" draw:layer="layout" svg:width="2.168cm" svg:height="0.801cm" svg:x="12.592cm" svg:y="11.23cm">
          <draw:text-box>
            <text:p text:style-name="P5"><text:span text:style-name="T5">Q/P/B</text:span></text:p>
          </draw:text-box>
        </draw:frame>
        <draw:line draw:style-name="gr23" draw:text-style-name="P4" draw:layer="layout" svg:x1="16.84cm" svg:y1="11.19cm" svg:x2="16.2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7.76cm" svg:y2="12.569cm">
          <text:p/>
        </draw:line>
        <draw:custom-shape draw:style-name="gr70" draw:text-style-name="P12" draw:layer="layout" svg:width="2.16cm" svg:height="0.46cm" draw:transform="rotate (1.5707963267949) translate (27.76cm 14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9.18cm" svg:y1="13cm" svg:x2="28.24cm" svg:y2="13cm">
          <text:p/>
        </draw:line>
        <draw:line draw:style-name="gr58" draw:text-style-name="P4" draw:layer="layout" svg:x1="11.35cm" svg:y1="14.73cm" svg:x2="5.07cm" svg:y2="14.73cm">
          <text:p/>
        </draw:line>
        <draw:line draw:style-name="gr58" draw:text-style-name="P4" draw:layer="layout" svg:x1="29.46cm" svg:y1="14.73cm" svg:x2="15.96cm" svg:y2="14.73cm">
          <text:p/>
        </draw:line>
        <draw:line draw:style-name="gr58" draw:text-style-name="P4" draw:layer="layout" svg:x1="28.02cm" svg:y1="14.73cm" svg:x2="28.02cm" svg:y2="14.1cm">
          <text:p/>
        </draw:line>
        <draw:frame draw:style-name="gr48" draw:text-style-name="P15" draw:layer="layout" svg:width="2.47cm" svg:height="0.801cm" svg:x="5.01cm" svg:y="14.179cm">
          <draw:text-box>
            <text:p text:style-name="P5"><text:span text:style-name="T8">MICRPOP CODE</text:span></text:p>
          </draw:text-box>
        </draw:frame>
        <draw:frame draw:style-name="gr48" draw:text-style-name="P15" draw:layer="layout" svg:width="2.8cm" svg:height="0.801cm" svg:x="15.49cm" svg:y="14.79cm">
          <draw:text-box>
            <text:p text:style-name="P5"><text:span text:style-name="T8">MICRO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5"><text:span text:style-name="T5">DATA</text:span></text:p>
          </draw:text-box>
        </draw:frame>
        <draw:line draw:style-name="gr58" draw:text-style-name="P4" draw:layer="layout" svg:x1="11.35cm" svg:y1="5.431cm" svg:x2="5.084cm" svg:y2="5.431cm">
          <text:p/>
        </draw:line>
        <draw:frame draw:style-name="gr48" draw:text-style-name="P15" draw:layer="layout" svg:width="2.456cm" svg:height="0.801cm" svg:x="5.024cm" svg:y="4.88cm">
          <draw:text-box>
            <text:p text:style-name="P5"><text:span text:style-name="T8">MICRO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5" draw:layer="layout" svg:width="2.53cm" svg:height="0.801cm" svg:x="27.6cm" svg:y="14.259cm">
          <draw:text-box>
            <text:p text:style-name="P5"><text:span text:style-name="T8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5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line draw:style-name="gr58" draw:text-style-name="P4" draw:layer="layout" svg:x1="1.89cm" svg:y1="5.431cm" svg:x2="0.484cm" svg:y2="5.431cm">
          <text:p/>
        </draw:line>
        <draw:frame draw:style-name="gr48" draw:text-style-name="P15" draw:layer="layout" svg:width="1.45cm" svg:height="0.801cm" svg:x="0.26cm" svg:y="4.539cm">
          <draw:text-box>
            <text:p text:style-name="P5"><text:span text:style-name="T8">OP CODE</text:span></text:p>
          </draw:text-box>
        </draw:fram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5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5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5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5"><text:span text:style-name="T5">Q/P/B</text:span></text:p>
          </draw:text-box>
        </draw:frame>
        <draw:custom-shape draw:style-name="gr87" draw:text-style-name="P19" draw:layer="layout" svg:width="0.89cm" svg:height="3.57cm" svg:x="11.33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cm" svg:y1="5.431cm" svg:x2="12.21cm" svg:y2="5.431cm">
          <text:p/>
        </draw:line>
        <draw:line draw:style-name="gr26" draw:text-style-name="P4" draw:layer="layout" svg:x1="17.76cm" svg:y1="7.46cm" svg:x2="12.21cm" svg:y2="7.46cm">
          <text:p/>
        </draw:line>
        <draw:custom-shape draw:style-name="gr88" draw:text-style-name="P19" draw:layer="layout" svg:width="0.89cm" svg:height="3.51cm" svg:x="11.33cm" svg:y="12.21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5.96cm" svg:y1="14.73cm" svg:x2="12.263cm" svg:y2="14.73cm">
          <text:p/>
        </draw:line>
        <draw:line draw:style-name="gr26" draw:text-style-name="P4" draw:layer="layout" svg:x1="29.7cm" svg:y1="6.32cm" svg:x2="12.21cm" svg:y2="6.32cm">
          <text:p/>
        </draw:line>
        <draw:custom-shape draw:style-name="gr73" draw:text-style-name="P12" draw:layer="layout" svg:width="1.453cm" svg:height="0.44cm" draw:transform="rotate (1.5707963267949) translate (15.8cm 11.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23" draw:text-style-name="P4" draw:layer="layout" svg:x1="14.19cm" svg:y1="11.79cm" svg:x2="14.19cm" svg:y2="10.64cm">
          <text:p/>
        </draw:line>
        <draw:line draw:style-name="gr23" draw:text-style-name="P4" draw:layer="layout" svg:x1="15.8cm" svg:y1="11.659cm" svg:x2="14.16cm" svg:y2="11.656cm">
          <text:p/>
        </draw:line>
        <draw:line draw:style-name="gr23" draw:text-style-name="P4" draw:layer="layout" svg:x1="15.82cm" svg:y1="10.792cm" svg:x2="14.2cm" svg:y2="10.787cm">
          <text:p/>
        </draw:line>
        <draw:custom-shape draw:style-name="gr89" draw:text-style-name="P20" draw:layer="layout" svg:width="0.77cm" svg:height="1.2cm" svg:x="14.47cm" svg:y="10.1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.01cm" svg:y1="14.71cm" svg:x2="16.01cm" svg:y2="11.75cm">
          <text:p/>
        </draw:line>
        <draw:frame draw:style-name="gr6" draw:text-style-name="P21" draw:layer="layout" svg:width="3.869cm" svg:height="0.663cm" svg:x="7.15cm" svg:y="3.87cm">
          <draw:text-box>
            <text:p><text:span text:style-name="T1">PIPELINE 0</text:span></text:p>
          </draw:text-box>
        </draw:frame>
        <draw:frame draw:style-name="gr6" draw:text-style-name="P21" draw:layer="layout" svg:width="3.869cm" svg:height="0.663cm" svg:x="17.55cm" svg:y="3.797cm">
          <draw:text-box>
            <text:p><text:span text:style-name="T1">PIPELINE 1</text:span></text:p>
          </draw:text-box>
        </draw:frame>
        <draw:frame draw:style-name="gr6" draw:text-style-name="P21" draw:layer="layout" svg:width="3.869cm" svg:height="0.663cm" svg:x="27.09cm" svg:y="3.807cm">
          <draw:text-box>
            <text:p><text:span text:style-name="T1">PIPELINE 2</text:span></text:p>
          </draw:text-box>
        </draw:frame>
        <draw:line draw:style-name="gr23" draw:text-style-name="P4" draw:layer="layout" svg:x1="27.76cm" svg:y1="14.069cm" svg:x2="15.56cm" svg:y2="14.047cm">
          <text:p/>
        </draw:line>
        <draw:line draw:style-name="gr23" draw:text-style-name="P4" draw:layer="layout" svg:x1="15.56cm" svg:y1="10.79cm" svg:x2="15.56cm" svg:y2="14.06cm">
          <text:p/>
        </draw:line>
        <draw:custom-shape draw:style-name="gr56" draw:text-style-name="P14" draw:layer="layout" svg:width="0.18cm" svg:height="0.18cm" svg:x="15.48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0" draw:layer="layout" svg:width="0.89cm" svg:height="11.33cm" svg:x="25.96cm" svg:y="4.53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1.22cm" svg:height="10.48cm" svg:x="1.63cm" svg:y="4.46cm">
          <text:p text:style-name="P16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Standard">
        <draw:line draw:style-name="gr26" draw:text-style-name="P4" draw:layer="layout" svg:x1="16.26cm" svg:y1="13.431cm" svg:x2="5.277cm" svg:y2="13.431cm">
          <text:p/>
        </draw:line>
        <draw:frame draw:style-name="gr48" draw:text-style-name="P13" draw:layer="layout" svg:width="1.63cm" svg:height="0.801cm" svg:x="4.957cm" svg:y="12.87cm">
          <draw:text-box>
            <text:p text:style-name="P5"><text:span text:style-name="T5">QTY</text:span></text:p>
          </draw:text-box>
        </draw:frame>
        <draw:line draw:style-name="gr26" draw:text-style-name="P4" draw:layer="layout" svg:x1="20.79cm" svg:y1="9.33cm" svg:x2="5.27cm" svg:y2="9.33cm">
          <text:p/>
        </draw:line>
        <draw:line draw:style-name="gr26" draw:text-style-name="P4" draw:layer="layout" svg:x1="21.57cm" svg:y1="10.43cm" svg:x2="5.27cm" svg:y2="10.43cm">
          <text:p/>
        </draw:line>
        <draw:line draw:style-name="gr26" draw:text-style-name="P4" draw:layer="layout" svg:x1="17.94cm" svg:y1="14.33cm" svg:x2="5.27cm" svg:y2="14.33cm">
          <text:p/>
        </draw:line>
        <draw:frame draw:style-name="gr47" draw:text-style-name="P13" draw:layer="layout" svg:width="1.54cm" svg:height="0.67cm" svg:x="4.95cm" svg:y="8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1.79cm" svg:height="0.67cm" svg:x="4.93cm" svg:y="9.95cm">
          <draw:text-box>
            <text:p text:style-name="P5"><text:span text:style-name="T5">PRICE</text:span></text:p>
          </draw:text-box>
        </draw:frame>
        <draw:frame draw:style-name="gr48" draw:text-style-name="P13" draw:layer="layout" svg:width="1.63cm" svg:height="0.801cm" svg:x="4.95cm" svg:y="13.769cm">
          <draw:text-box>
            <text:p text:style-name="P5"><text:span text:style-name="T5">is_buy</text:span></text:p>
          </draw:text-box>
        </draw:frame>
        <draw:custom-shape draw:style-name="gr91" draw:text-style-name="P31" draw:layer="layout" svg:width="15.84cm" svg:height="2.13cm" svg:x="8.66cm" svg:y="5cm">
          <text:p text:style-name="P30"><text:span text:style-name="T11">LADDER BRAM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21.49cm" svg:y1="7.16cm" svg:x2="21.49cm" svg:y2="10.43cm">
          <text:p/>
        </draw:line>
        <draw:custom-shape draw:style-name="gr56" draw:text-style-name="P14" draw:layer="layout" svg:width="0.18cm" svg:height="0.18cm" svg:x="9.95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10.41cm" svg:y="6.58cm">
          <draw:text-box>
            <text:p text:style-name="P5"><text:span text:style-name="T5">RA1</text:span></text:p>
          </draw:text-box>
        </draw:frame>
        <draw:line draw:style-name="gr58" draw:text-style-name="P4" draw:layer="layout" svg:x1="16.59cm" svg:y1="15.63cm" svg:x2="5.27cm" svg:y2="15.63cm">
          <text:p/>
        </draw:line>
        <draw:frame draw:style-name="gr48" draw:text-style-name="P15" draw:layer="layout" svg:width="2.39cm" svg:height="0.801cm" svg:x="4.97cm" svg:y="15.109cm">
          <draw:text-box>
            <text:p text:style-name="P5"><text:span text:style-name="T8">ADD/REM</text:span></text:p>
          </draw:text-box>
        </draw:frame>
        <draw:custom-shape draw:style-name="gr92" draw:text-style-name="P31" draw:layer="layout" svg:width="6.51cm" svg:height="1.57cm" svg:x="13.22cm" svg:y="2.72cm">
          <text:p text:style-name="P30"><text:span text:style-name="T11">AXI LITE SLAVE FSM</text:span></text:p>
          <draw:enhanced-geometry svg:viewBox="0 0 21600 21600" draw:type="rectangle" draw:enhanced-path="M 0 0 L 21600 0 21600 21600 0 21600 0 0 Z N"/>
        </draw:custom-shape>
        <draw:frame draw:style-name="gr47" draw:text-style-name="P13" draw:layer="layout" svg:width="1.54cm" svg:height="0.67cm" svg:x="15.08cm" svg:y="4.97cm">
          <draw:text-box>
            <text:p text:style-name="P5"><text:span text:style-name="T5">RE2</text:span></text:p>
          </draw:text-box>
        </draw:frame>
        <draw:frame draw:style-name="gr47" draw:text-style-name="P13" draw:layer="layout" svg:width="1.54cm" svg:height="0.67cm" svg:x="16.51cm" svg:y="4.99cm">
          <draw:text-box>
            <text:p text:style-name="P5"><text:span text:style-name="T5">RD2</text:span></text:p>
          </draw:text-box>
        </draw:frame>
        <draw:line draw:style-name="gr26" draw:text-style-name="P4" draw:layer="layout" svg:x1="17.28cm" svg:y1="4.28cm" svg:x2="17.28cm" svg:y2="4.97cm">
          <text:p/>
        </draw:line>
        <draw:line draw:style-name="gr26" draw:text-style-name="P4" draw:layer="layout" svg:x1="15.88cm" svg:y1="4.28cm" svg:x2="15.88cm" svg:y2="4.97cm">
          <text:p/>
        </draw:line>
        <draw:frame draw:style-name="gr47" draw:text-style-name="P13" draw:layer="layout" svg:width="1.54cm" svg:height="0.67cm" svg:x="14.63cm" svg:y="6.56cm">
          <draw:text-box>
            <text:p text:style-name="P5"><text:span text:style-name="T5">RD1</text:span></text:p>
          </draw:text-box>
        </draw:frame>
        <draw:line draw:style-name="gr26" draw:text-style-name="P4" draw:layer="layout" svg:x1="16.58cm" svg:y1="4.28cm" svg:x2="16.58cm" svg:y2="4.97cm">
          <text:p/>
        </draw:line>
        <draw:frame draw:style-name="gr47" draw:text-style-name="P13" draw:layer="layout" svg:width="1.54cm" svg:height="0.67cm" svg:x="15.78cm" svg:y="4.97cm">
          <draw:text-box>
            <text:p text:style-name="P5"><text:span text:style-name="T5">RA2</text:span></text:p>
          </draw:text-box>
        </draw:frame>
        <draw:frame draw:style-name="gr47" draw:text-style-name="P13" draw:layer="layout" svg:width="1.54cm" svg:height="0.67cm" svg:x="9.29cm" svg:y="6.58cm">
          <draw:text-box>
            <text:p text:style-name="P5"><text:span text:style-name="T5">RE1</text:span></text:p>
          </draw:text-box>
        </draw:frame>
        <draw:line draw:style-name="gr26" draw:text-style-name="P4" draw:layer="layout" svg:x1="10.04cm" svg:y1="7.14cm" svg:x2="10.04cm" svg:y2="9.34cm">
          <text:p/>
        </draw:line>
        <draw:custom-shape draw:style-name="gr56" draw:text-style-name="P14" draw:layer="layout" svg:width="0.18cm" svg:height="0.18cm" svg:x="21.4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0" draw:layer="layout" svg:width="0.89cm" svg:height="11.33cm" svg:x="13.13cm" svg:y="7.4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5.29cm" svg:y1="7.16cm" svg:x2="15.29cm" svg:y2="12.84cm">
          <text:p/>
        </draw:line>
        <draw:frame draw:style-name="gr47" draw:text-style-name="P13" draw:layer="layout" svg:width="1.54cm" svg:height="0.67cm" svg:x="20cm" svg:y="6.59cm">
          <draw:text-box>
            <text:p text:style-name="P5"><text:span text:style-name="T5">WE</text:span></text:p>
          </draw:text-box>
        </draw:frame>
        <draw:frame draw:style-name="gr47" draw:text-style-name="P13" draw:layer="layout" svg:width="1.54cm" svg:height="0.67cm" svg:x="20.82cm" svg:y="6.58cm">
          <draw:text-box>
            <text:p text:style-name="P5"><text:span text:style-name="T5">WA</text:span></text:p>
          </draw:text-box>
        </draw:frame>
        <draw:frame draw:style-name="gr47" draw:text-style-name="P13" draw:layer="layout" svg:width="1.54cm" svg:height="0.67cm" svg:x="21.67cm" svg:y="6.58cm">
          <draw:text-box>
            <text:p text:style-name="P5"><text:span text:style-name="T5">WD</text:span></text:p>
          </draw:text-box>
        </draw:frame>
        <draw:custom-shape draw:style-name="gr56" draw:text-style-name="P14" draw:layer="layout" svg:width="0.18cm" svg:height="0.18cm" svg:x="20.651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20.741cm" svg:y1="7.134cm" svg:x2="20.741cm" svg:y2="9.334cm">
          <text:p/>
        </draw:line>
        <draw:line draw:style-name="gr23" draw:text-style-name="P4" draw:layer="layout" svg:x1="16.27cm" svg:y1="12.84cm" svg:x2="15.29cm" svg:y2="12.84cm">
          <text:p/>
        </draw:line>
        <draw:line draw:style-name="gr60" draw:text-style-name="P4" draw:layer="layout" svg:x1="16.26cm" svg:y1="12.3cm" svg:x2="16.26cm" svg:y2="13.002cm">
          <text:p/>
        </draw:line>
        <draw:line draw:style-name="gr60" draw:text-style-name="P4" draw:layer="layout" svg:x1="16.26cm" svg:y1="13.274cm" svg:x2="16.26cm" svg:y2="13.976cm">
          <text:p/>
        </draw:line>
        <draw:line draw:style-name="gr60" draw:text-style-name="P4" draw:layer="layout" svg:x1="16.26cm" svg:y1="12.3cm" svg:x2="16.92cm" svg:y2="12.753cm">
          <text:p/>
        </draw:line>
        <draw:line draw:style-name="gr60" draw:text-style-name="P4" draw:layer="layout" svg:x1="16.26cm" svg:y1="13.976cm" svg:x2="16.92cm" svg:y2="13.659cm">
          <text:p/>
        </draw:line>
        <draw:line draw:style-name="gr60" draw:text-style-name="P4" draw:layer="layout" svg:x1="16.907cm" svg:y1="12.734cm" svg:x2="16.907cm" svg:y2="13.685cm">
          <text:p/>
        </draw:line>
        <draw:line draw:style-name="gr60" draw:text-style-name="P4" draw:layer="layout" svg:x1="16.452cm" svg:y1="13.138cm" svg:x2="16.26cm" svg:y2="13.002cm">
          <text:p/>
        </draw:line>
        <draw:line draw:style-name="gr60" draw:text-style-name="P4" draw:layer="layout" svg:x1="16.452cm" svg:y1="13.138cm" svg:x2="16.26cm" svg:y2="13.274cm">
          <text:p/>
        </draw:line>
        <draw:line draw:style-name="gr58" draw:text-style-name="P4" draw:layer="layout" svg:x1="16.595cm" svg:y1="15.63cm" svg:x2="16.595cm" svg:y2="13.83cm">
          <text:p/>
        </draw:line>
        <draw:line draw:style-name="gr26" draw:text-style-name="P4" draw:layer="layout" svg:x1="17.94cm" svg:y1="13.19cm" svg:x2="16.907cm" svg:y2="13.19cm">
          <text:p/>
        </draw:line>
        <draw:line draw:style-name="gr23" draw:text-style-name="P4" draw:layer="layout" svg:x1="17.94cm" svg:y1="14.55cm" svg:x2="17.94cm" svg:y2="12.99cm">
          <text:p/>
        </draw:line>
        <draw:line draw:style-name="gr23" draw:text-style-name="P4" draw:layer="layout" svg:x1="22.37cm" svg:y1="13.77cm" svg:x2="17.92cm" svg:y2="13.77cm">
          <text:p/>
        </draw:line>
        <draw:line draw:style-name="gr23" draw:text-style-name="P4" draw:layer="layout" svg:x1="22.37cm" svg:y1="13.77cm" svg:x2="22.37cm" svg:y2="7.14cm">
          <text:p/>
        </draw:line>
        <draw:line draw:style-name="gr26" draw:text-style-name="P4" draw:layer="layout" svg:x1="11.191cm" svg:y1="7.154cm" svg:x2="11.191cm" svg:y2="10.424cm">
          <text:p/>
        </draw:line>
        <draw:custom-shape draw:style-name="gr56" draw:text-style-name="P14" draw:layer="layout" svg:width="0.18cm" svg:height="0.18cm" svg:x="11.101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3" draw:layer="layout" svg:width="1.82cm" svg:height="0.73cm" svg:x="7.28cm" svg:y="10.09cm">
          <text:p text:style-name="P32"><text:span text:style-name="T3">QUANTIZE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6.51cm" svg:y1="2.69cm" svg:x2="16.51cm" svg:y2="1.27cm">
          <text:p/>
        </draw:line>
      </draw:page>
      <draw:page draw:name="page9" draw:style-name="dp1" draw:master-page-name="Standard">
        <draw:custom-shape draw:style-name="gr95" draw:text-style-name="P35" draw:layer="layout" svg:width="2.9cm" svg:height="5.53cm" svg:x="22.481cm" svg:y="6.654cm">
          <text:p text:style-name="P34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96" draw:text-style-name="P36" draw:layer="layout" svg:x1="11.311cm" svg:y1="6.344cm" svg:x2="5.071cm" svg:y2="6.344cm">
          <text:p/>
        </draw:line>
        <draw:line draw:style-name="gr96" draw:text-style-name="P36" draw:layer="layout" svg:x1="6.601cm" svg:y1="7.444cm" svg:x2="5.071cm" svg:y2="7.444cm">
          <text:p/>
        </draw:line>
        <draw:line draw:style-name="gr97" draw:text-style-name="P36" draw:layer="layout" svg:x1="11.331cm" svg:y1="13.244cm" svg:x2="5.071cm" svg:y2="13.244cm">
          <text:p/>
        </draw:line>
        <draw:frame draw:style-name="gr98" draw:text-style-name="P38" draw:layer="layout" svg:width="1.54cm" svg:height="0.67cm" svg:x="4.751cm" svg:y="5.794cm">
          <draw:text-box>
            <text:p text:style-name="P37"><text:span text:style-name="T5">VALID</text:span></text:p>
          </draw:text-box>
        </draw:frame>
        <draw:frame draw:style-name="gr98" draw:text-style-name="P38" draw:layer="layout" svg:width="2cm" svg:height="0.67cm" svg:x="4.451cm" svg:y="6.994cm">
          <draw:text-box>
            <text:p text:style-name="P37"><text:span text:style-name="T5">REF</text:span></text:p>
          </draw:text-box>
        </draw:frame>
        <draw:line draw:style-name="gr96" draw:text-style-name="P36" draw:layer="layout" svg:x1="18.461cm" svg:y1="6.344cm" svg:x2="18.461cm" svg:y2="7.624cm">
          <text:p/>
        </draw:line>
        <draw:line draw:style-name="gr96" draw:text-style-name="P36" draw:layer="layout" svg:x1="22.491cm" svg:y1="7.744cm" svg:x2="22.221cm" svg:y2="7.744cm">
          <text:p/>
        </draw:line>
        <draw:custom-shape draw:style-name="gr99" draw:text-style-name="P35" draw:layer="layout" svg:width="0.89cm" svg:height="11.33cm" svg:x="4.191cm" svg:y="4.434cm">
          <text:p text:style-name="P34"><text:span text:style-name="T1">V</text:span></text:p>
          <draw:enhanced-geometry svg:viewBox="0 0 21600 21600" draw:type="rectangle" draw:enhanced-path="M 0 0 L 21600 0 21600 21600 0 21600 0 0 Z N"/>
        </draw:custom-shape>
        <draw:frame draw:style-name="gr100" draw:text-style-name="P38" draw:layer="layout" svg:width="1.63cm" svg:height="0.801cm" svg:x="4.751cm" svg:y="12.683cm">
          <draw:text-box>
            <text:p text:style-name="P37"><text:span text:style-name="T5">Q/P/B</text:span></text:p>
          </draw:text-box>
        </draw:frame>
        <draw:frame draw:style-name="gr98" draw:text-style-name="P38" draw:layer="layout" svg:width="1.54cm" svg:height="0.67cm" svg:x="22.111cm" svg:y="7.494cm">
          <draw:text-box>
            <text:p text:style-name="P37"><text:span text:style-name="T5">WE</text:span></text:p>
          </draw:text-box>
        </draw:frame>
        <draw:custom-shape draw:style-name="gr101" draw:text-style-name="P35" draw:layer="layout" svg:width="1.63cm" svg:height="1.12cm" draw:transform="rotate (1.5707963267949) translate (6.581cm 8.214cm)">
          <text:p text:style-name="P34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96" draw:text-style-name="P36" draw:layer="layout" svg:x1="11.331cm" svg:y1="7.434cm" svg:x2="7.701cm" svg:y2="7.434cm">
          <text:p/>
        </draw:line>
        <draw:frame draw:style-name="gr98" draw:text-style-name="P38" draw:layer="layout" svg:width="2cm" svg:height="0.67cm" svg:x="6.941cm" svg:y="6.964cm">
          <draw:text-box>
            <text:p text:style-name="P37"><text:span text:style-name="T5">A</text:span></text:p>
          </draw:text-box>
        </draw:frame>
        <draw:frame draw:style-name="gr98" draw:text-style-name="P38" draw:layer="layout" svg:width="1.54cm" svg:height="0.67cm" svg:x="27.921cm" svg:y="5.844cm">
          <draw:text-box>
            <text:p text:style-name="P37"><text:span text:style-name="T5">VALID</text:span></text:p>
          </draw:text-box>
        </draw:frame>
        <draw:line draw:style-name="gr96" draw:text-style-name="P36" draw:layer="layout" svg:x1="17.761cm" svg:y1="7.444cm" svg:x2="17.761cm" svg:y2="8.924cm">
          <text:p/>
        </draw:line>
        <draw:line draw:style-name="gr96" draw:text-style-name="P36" draw:layer="layout" svg:x1="22.461cm" svg:y1="8.914cm" svg:x2="17.751cm" svg:y2="8.914cm">
          <text:p/>
        </draw:line>
        <draw:frame draw:style-name="gr98" draw:text-style-name="P38" draw:layer="layout" svg:width="1.54cm" svg:height="0.67cm" svg:x="22.251cm" svg:y="8.644cm">
          <draw:text-box>
            <text:p text:style-name="P37"><text:span text:style-name="T5">ADDR</text:span></text:p>
          </draw:text-box>
        </draw:frame>
        <draw:line draw:style-name="gr97" draw:text-style-name="P36" draw:layer="layout" svg:x1="27.761cm" svg:y1="13.274cm" svg:x2="12.261cm" svg:y2="13.274cm">
          <text:p/>
        </draw:line>
        <draw:frame draw:style-name="gr98" draw:text-style-name="P38" draw:layer="layout" svg:width="1.54cm" svg:height="0.67cm" svg:x="27.911cm" svg:y="12.404cm">
          <draw:text-box>
            <text:p text:style-name="P37"><text:span text:style-name="T5">Q/P</text:span></text:p>
          </draw:text-box>
        </draw:frame>
        <draw:custom-shape draw:style-name="gr102" draw:text-style-name="P35" draw:layer="layout" svg:width="2.9cm" svg:height="4.2cm" svg:x="10.371cm" svg:y="8.014cm">
          <text:p text:style-name="P34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96" draw:text-style-name="P36" draw:layer="layout" svg:x1="8.641cm" svg:y1="6.364cm" svg:x2="8.641cm" svg:y2="9.254cm">
          <text:p/>
        </draw:line>
        <draw:line draw:style-name="gr96" draw:text-style-name="P36" draw:layer="layout" svg:x1="9.481cm" svg:y1="9.254cm" svg:x2="8.641cm" svg:y2="9.254cm">
          <text:p/>
        </draw:line>
        <draw:custom-shape draw:style-name="gr103" draw:text-style-name="P39" draw:layer="layout" svg:width="0.18cm" svg:height="0.18cm" svg:x="8.551cm" svg:y="6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38" draw:layer="layout" svg:width="1.54cm" svg:height="0.67cm" svg:x="9.971cm" svg:y="8.834cm">
          <draw:text-box>
            <text:p text:style-name="P37"><text:span text:style-name="T5">RE</text:span></text:p>
          </draw:text-box>
        </draw:frame>
        <draw:line draw:style-name="gr96" draw:text-style-name="P36" draw:layer="layout" svg:x1="8.241cm" svg:y1="7.464cm" svg:x2="8.241cm" svg:y2="10.154cm">
          <text:p/>
        </draw:line>
        <draw:custom-shape draw:style-name="gr103" draw:text-style-name="P39" draw:layer="layout" svg:width="0.18cm" svg:height="0.18cm" svg:x="8.152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6" draw:layer="layout" svg:x1="10.341cm" svg:y1="10.154cm" svg:x2="8.241cm" svg:y2="10.154cm">
          <text:p/>
        </draw:line>
        <draw:frame draw:style-name="gr98" draw:text-style-name="P38" draw:layer="layout" svg:width="1.54cm" svg:height="0.67cm" svg:x="10.071cm" svg:y="9.934cm">
          <draw:text-box>
            <text:p text:style-name="P37"><text:span text:style-name="T5">ADDR</text:span></text:p>
          </draw:text-box>
        </draw:frame>
        <draw:line draw:style-name="gr97" draw:text-style-name="P36" draw:layer="layout" svg:x1="14.181cm" svg:y1="11.207cm" svg:x2="13.271cm" svg:y2="11.204cm">
          <text:p/>
        </draw:line>
        <draw:frame draw:style-name="gr100" draw:text-style-name="P38" draw:layer="layout" svg:width="2.168cm" svg:height="0.801cm" svg:x="12.593cm" svg:y="11.244cm">
          <draw:text-box>
            <text:p text:style-name="P37"><text:span text:style-name="T5">Q/P/B</text:span></text:p>
          </draw:text-box>
        </draw:frame>
        <draw:line draw:style-name="gr97" draw:text-style-name="P36" draw:layer="layout" svg:x1="16.841cm" svg:y1="11.204cm" svg:x2="16.241cm" svg:y2="11.204cm">
          <text:p/>
        </draw:line>
        <draw:line draw:style-name="gr97" draw:text-style-name="P36" draw:layer="layout" svg:x1="16.846cm" svg:y1="12.584cm" svg:x2="16.846cm" svg:y2="11.204cm">
          <text:p/>
        </draw:line>
        <draw:line draw:style-name="gr97" draw:text-style-name="P36" draw:layer="layout" svg:x1="16.846cm" svg:y1="12.574cm" svg:x2="27.761cm" svg:y2="12.583cm">
          <text:p/>
        </draw:line>
        <draw:custom-shape draw:style-name="gr104" draw:text-style-name="P40" draw:layer="layout" svg:width="2.16cm" svg:height="0.46cm" draw:transform="rotate (1.5707963267949) translate (27.761cm 14.3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97" draw:text-style-name="P36" draw:layer="layout" svg:x1="29.181cm" svg:y1="13.014cm" svg:x2="28.241cm" svg:y2="13.014cm">
          <text:p/>
        </draw:line>
        <draw:line draw:style-name="gr97" draw:text-style-name="P36" draw:layer="layout" svg:x1="11.351cm" svg:y1="14.744cm" svg:x2="5.071cm" svg:y2="14.744cm">
          <text:p/>
        </draw:line>
        <draw:line draw:style-name="gr97" draw:text-style-name="P36" draw:layer="layout" svg:x1="29.461cm" svg:y1="14.744cm" svg:x2="15.961cm" svg:y2="14.744cm">
          <text:p/>
        </draw:line>
        <draw:line draw:style-name="gr97" draw:text-style-name="P36" draw:layer="layout" svg:x1="28.021cm" svg:y1="14.744cm" svg:x2="28.021cm" svg:y2="14.114cm">
          <text:p/>
        </draw:line>
        <draw:frame draw:style-name="gr100" draw:text-style-name="P38" draw:layer="layout" svg:width="2.47cm" svg:height="0.801cm" svg:x="5.011cm" svg:y="14.193cm">
          <draw:text-box>
            <text:p text:style-name="P37"><text:span text:style-name="T5">MICRPOP CODE</text:span></text:p>
          </draw:text-box>
        </draw:frame>
        <draw:frame draw:style-name="gr100" draw:text-style-name="P38" draw:layer="layout" svg:width="2.8cm" svg:height="0.801cm" svg:x="15.491cm" svg:y="14.804cm">
          <draw:text-box>
            <text:p text:style-name="P37"><text:span text:style-name="T5">MICROOP CODE</text:span></text:p>
          </draw:text-box>
        </draw:frame>
        <draw:line draw:style-name="gr97" draw:text-style-name="P36" draw:layer="layout" svg:x1="18.101cm" svg:y1="10.494cm" svg:x2="18.091cm" svg:y2="13.274cm">
          <text:p/>
        </draw:line>
        <draw:line draw:style-name="gr97" draw:text-style-name="P36" draw:layer="layout" svg:x1="19.471cm" svg:y1="10.504cm" svg:x2="18.091cm" svg:y2="10.504cm">
          <text:p/>
        </draw:line>
        <draw:custom-shape draw:style-name="gr103" draw:text-style-name="P39" draw:layer="layout" svg:width="0.18cm" svg:height="0.18cm" svg:x="18.001cm" svg:y="13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38" draw:layer="layout" svg:width="1.54cm" svg:height="0.67cm" svg:x="22.251cm" svg:y="10.644cm">
          <draw:text-box>
            <text:p text:style-name="P37"><text:span text:style-name="T5">DATA</text:span></text:p>
          </draw:text-box>
        </draw:frame>
        <draw:line draw:style-name="gr97" draw:text-style-name="P36" draw:layer="layout" svg:x1="11.351cm" svg:y1="5.445cm" svg:x2="5.085cm" svg:y2="5.445cm">
          <text:p/>
        </draw:line>
        <draw:frame draw:style-name="gr100" draw:text-style-name="P38" draw:layer="layout" svg:width="2.456cm" svg:height="0.801cm" svg:x="5.025cm" svg:y="4.894cm">
          <draw:text-box>
            <text:p text:style-name="P37"><text:span text:style-name="T5">MICROOP CODE</text:span></text:p>
          </draw:text-box>
        </draw:frame>
        <draw:ellipse draw:style-name="gr105" draw:text-style-name="P41" draw:layer="layout" svg:width="0.434cm" svg:height="0.475cm" draw:transform="rotate (-3.14159265358979) translate (9.921cm 9.379cm)" draw:kind="arc" draw:start-angle="90.87" draw:end-angle="269.2">
          <text:p/>
        </draw:ellipse>
        <draw:line draw:style-name="gr96" draw:text-style-name="P36" draw:layer="layout" svg:x1="9.718cm" svg:y1="8.899cm" svg:x2="9.491cm" svg:y2="8.899cm">
          <text:p/>
        </draw:line>
        <draw:line draw:style-name="gr96" draw:text-style-name="P36" draw:layer="layout" svg:x1="9.718cm" svg:y1="9.379cm" svg:x2="9.491cm" svg:y2="9.379cm">
          <text:p/>
        </draw:line>
        <draw:line draw:style-name="gr96" draw:text-style-name="P36" draw:layer="layout" svg:x1="9.491cm" svg:y1="9.384cm" svg:x2="9.491cm" svg:y2="8.899cm">
          <text:p/>
        </draw:line>
        <draw:line draw:style-name="gr97" draw:text-style-name="P36" draw:layer="layout" svg:x1="8.861cm" svg:y1="9.024cm" svg:x2="9.481cm" svg:y2="9.024cm">
          <text:p/>
        </draw:line>
        <draw:line draw:style-name="gr97" draw:text-style-name="P36" draw:layer="layout" svg:x1="8.861cm" svg:y1="9.024cm" svg:x2="8.861cm" svg:y2="5.454cm">
          <text:p/>
        </draw:line>
        <draw:line draw:style-name="gr96" draw:text-style-name="P36" draw:layer="layout" svg:x1="10.371cm" svg:y1="9.124cm" svg:x2="9.921cm" svg:y2="9.124cm">
          <text:p/>
        </draw:line>
        <draw:ellipse draw:style-name="gr105" draw:text-style-name="P41" draw:layer="layout" svg:width="0.434cm" svg:height="0.379cm" draw:transform="rotate (-3.14159265358979) translate (22.217cm 7.93cm)" draw:kind="arc" draw:start-angle="90.87" draw:end-angle="269.2">
          <text:p/>
        </draw:ellipse>
        <draw:line draw:style-name="gr96" draw:text-style-name="P36" draw:layer="layout" svg:x1="22.014cm" svg:y1="7.548cm" svg:x2="21.787cm" svg:y2="7.548cm">
          <text:p/>
        </draw:line>
        <draw:line draw:style-name="gr96" draw:text-style-name="P36" draw:layer="layout" svg:x1="22.014cm" svg:y1="7.93cm" svg:x2="21.787cm" svg:y2="7.93cm">
          <text:p/>
        </draw:line>
        <draw:line draw:style-name="gr96" draw:text-style-name="P36" draw:layer="layout" svg:x1="21.787cm" svg:y1="7.934cm" svg:x2="21.787cm" svg:y2="7.548cm">
          <text:p/>
        </draw:line>
        <draw:line draw:style-name="gr97" draw:text-style-name="P36" draw:layer="layout" svg:x1="18.157cm" svg:y1="7.825cm" svg:x2="21.781cm" svg:y2="7.825cm">
          <text:p/>
        </draw:line>
        <draw:line draw:style-name="gr97" draw:text-style-name="P36" draw:layer="layout" svg:x1="18.157cm" svg:y1="7.844cm" svg:x2="18.157cm" svg:y2="5.448cm">
          <text:p/>
        </draw:line>
        <draw:line draw:style-name="gr96" draw:text-style-name="P36" draw:layer="layout" svg:x1="21.781cm" svg:y1="7.634cm" svg:x2="18.471cm" svg:y2="7.634cm">
          <text:p/>
        </draw:line>
        <draw:line draw:style-name="gr97" draw:text-style-name="P36" draw:layer="layout" svg:x1="18.171cm" svg:y1="5.444cm" svg:x2="15.931cm" svg:y2="5.444cm">
          <text:p/>
        </draw:line>
        <draw:frame draw:style-name="gr100" draw:text-style-name="P38" draw:layer="layout" svg:width="2.53cm" svg:height="0.801cm" svg:x="27.601cm" svg:y="14.273cm">
          <draw:text-box>
            <text:p text:style-name="P37"><text:span text:style-name="T5">ADD+ / REM-</text:span></text:p>
          </draw:text-box>
        </draw:frame>
        <draw:custom-shape draw:style-name="gr103" draw:text-style-name="P39" draw:layer="layout" svg:width="0.18cm" svg:height="0.18cm" svg:x="18.641cm" svg:y="1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36" draw:layer="layout" svg:x1="18.73cm" svg:y1="10.854cm" svg:x2="18.725cm" svg:y2="12.564cm">
          <text:p/>
        </draw:line>
        <draw:line draw:style-name="gr97" draw:text-style-name="P36" draw:layer="layout" svg:x1="19.471cm" svg:y1="10.854cm" svg:x2="18.721cm" svg:y2="10.854cm">
          <text:p/>
        </draw:line>
        <draw:line draw:style-name="gr106" draw:text-style-name="P36" draw:layer="layout" svg:x1="19.481cm" svg:y1="10.034cm" svg:x2="19.481cm" svg:y2="10.566cm">
          <text:p/>
        </draw:line>
        <draw:line draw:style-name="gr106" draw:text-style-name="P36" draw:layer="layout" svg:x1="19.481cm" svg:y1="10.772cm" svg:x2="19.481cm" svg:y2="11.304cm">
          <text:p/>
        </draw:line>
        <draw:line draw:style-name="gr106" draw:text-style-name="P36" draw:layer="layout" svg:x1="19.481cm" svg:y1="10.034cm" svg:x2="19.981cm" svg:y2="10.377cm">
          <text:p/>
        </draw:line>
        <draw:line draw:style-name="gr106" draw:text-style-name="P36" draw:layer="layout" svg:x1="19.481cm" svg:y1="11.304cm" svg:x2="19.981cm" svg:y2="11.064cm">
          <text:p/>
        </draw:line>
        <draw:line draw:style-name="gr106" draw:text-style-name="P36" draw:layer="layout" svg:x1="19.971cm" svg:y1="10.363cm" svg:x2="19.971cm" svg:y2="11.084cm">
          <text:p/>
        </draw:line>
        <draw:line draw:style-name="gr106" draw:text-style-name="P36" draw:layer="layout" svg:x1="19.627cm" svg:y1="10.669cm" svg:x2="19.481cm" svg:y2="10.566cm">
          <text:p/>
        </draw:line>
        <draw:line draw:style-name="gr106" draw:text-style-name="P36" draw:layer="layout" svg:x1="19.627cm" svg:y1="10.669cm" svg:x2="19.481cm" svg:y2="10.772cm">
          <text:p/>
        </draw:line>
        <draw:frame draw:style-name="gr98" draw:text-style-name="P38" draw:layer="layout" svg:width="1.54cm" svg:height="0.67cm" svg:x="19.021cm" svg:y="10.404cm">
          <draw:text-box>
            <text:p text:style-name="P37"><text:span text:style-name="T5">-</text:span></text:p>
          </draw:text-box>
        </draw:frame>
        <draw:custom-shape draw:style-name="gr107" draw:text-style-name="P40" draw:layer="layout" svg:width="1.41cm" svg:height="0.32cm" draw:transform="rotate (1.5707963267949) translate (21.721cm 11.65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97" draw:text-style-name="P36" draw:layer="layout" svg:x1="22.481cm" svg:y1="10.914cm" svg:x2="22.061cm" svg:y2="10.914cm">
          <text:p/>
        </draw:line>
        <draw:custom-shape draw:style-name="gr103" draw:text-style-name="P39" draw:layer="layout" svg:width="0.18cm" svg:height="0.18cm" svg:x="20.881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36" draw:layer="layout" svg:x1="20.969cm" svg:y1="11.234cm" svg:x2="20.965cm" svg:y2="12.554cm">
          <text:p/>
        </draw:line>
        <draw:line draw:style-name="gr97" draw:text-style-name="P36" draw:layer="layout" svg:x1="21.711cm" svg:y1="11.244cm" svg:x2="20.961cm" svg:y2="11.244cm">
          <text:p/>
        </draw:line>
        <draw:line draw:style-name="gr97" draw:text-style-name="P36" draw:layer="layout" svg:x1="21.711cm" svg:y1="10.654cm" svg:x2="19.981cm" svg:y2="10.654cm">
          <text:p/>
        </draw:line>
        <draw:line draw:style-name="gr97" draw:text-style-name="P36" draw:layer="layout" svg:x1="21.871cm" svg:y1="14.734cm" svg:x2="21.871cm" svg:y2="11.514cm">
          <text:p/>
        </draw:line>
        <draw:line draw:style-name="gr97" draw:text-style-name="P36" draw:layer="layout" svg:x1="1.891cm" svg:y1="5.445cm" svg:x2="0.485cm" svg:y2="5.445cm">
          <text:p/>
        </draw:line>
        <draw:frame draw:style-name="gr100" draw:text-style-name="P38" draw:layer="layout" svg:width="1.45cm" svg:height="0.801cm" svg:x="0.261cm" svg:y="4.553cm">
          <draw:text-box>
            <text:p text:style-name="P37"><text:span text:style-name="T5">OP CODE</text:span></text:p>
          </draw:text-box>
        </draw:frame>
        <draw:line draw:style-name="gr97" draw:text-style-name="P36" draw:layer="layout" svg:x1="4.181cm" svg:y1="5.445cm" svg:x2="2.585cm" svg:y2="5.445cm">
          <text:p/>
        </draw:line>
        <draw:line draw:style-name="gr96" draw:text-style-name="P36" draw:layer="layout" svg:x1="4.181cm" svg:y1="6.344cm" svg:x2="2.721cm" svg:y2="6.344cm">
          <text:p/>
        </draw:line>
        <draw:line draw:style-name="gr96" draw:text-style-name="P36" draw:layer="layout" svg:x1="4.181cm" svg:y1="7.444cm" svg:x2="2.801cm" svg:y2="7.444cm">
          <text:p/>
        </draw:line>
        <draw:frame draw:style-name="gr100" draw:text-style-name="P38" draw:layer="layout" svg:width="1.63cm" svg:height="0.801cm" svg:x="0.151cm" svg:y="8.095cm">
          <draw:text-box>
            <text:p text:style-name="P37"><text:span text:style-name="T5">NEWREF</text:span></text:p>
          </draw:text-box>
        </draw:frame>
        <draw:line draw:style-name="gr96" draw:text-style-name="P36" draw:layer="layout" svg:x1="1.651cm" svg:y1="8.644cm" svg:x2="0.171cm" svg:y2="8.644cm">
          <text:p/>
        </draw:line>
        <draw:line draw:style-name="gr96" draw:text-style-name="P36" draw:layer="layout" svg:x1="1.651cm" svg:y1="7.444cm" svg:x2="0.171cm" svg:y2="7.444cm">
          <text:p/>
        </draw:line>
        <draw:frame draw:style-name="gr100" draw:text-style-name="P38" draw:layer="layout" svg:width="1.63cm" svg:height="0.801cm" svg:x="0.151cm" svg:y="6.996cm">
          <draw:text-box>
            <text:p text:style-name="P37"><text:span text:style-name="T5">REF</text:span></text:p>
          </draw:text-box>
        </draw:frame>
        <draw:line draw:style-name="gr96" draw:text-style-name="P36" draw:layer="layout" svg:x1="1.781cm" svg:y1="6.344cm" svg:x2="0.321cm" svg:y2="6.344cm">
          <text:p/>
        </draw:line>
        <draw:frame draw:style-name="gr100" draw:text-style-name="P38" draw:layer="layout" svg:width="1.63cm" svg:height="0.801cm" svg:x="0.151cm" svg:y="5.897cm">
          <draw:text-box>
            <text:p text:style-name="P37"><text:span text:style-name="T5">VALID</text:span></text:p>
          </draw:text-box>
        </draw:frame>
        <draw:line draw:style-name="gr97" draw:text-style-name="P36" draw:layer="layout" svg:x1="4.191cm" svg:y1="13.244cm" svg:x2="2.711cm" svg:y2="13.244cm">
          <text:p/>
        </draw:line>
        <draw:line draw:style-name="gr97" draw:text-style-name="P36" draw:layer="layout" svg:x1="1.791cm" svg:y1="13.244cm" svg:x2="0.551cm" svg:y2="13.244cm">
          <text:p/>
        </draw:line>
        <draw:frame draw:style-name="gr100" draw:text-style-name="P38" draw:layer="layout" svg:width="1.63cm" svg:height="0.801cm" svg:x="0.351cm" svg:y="12.684cm">
          <draw:text-box>
            <text:p text:style-name="P37"><text:span text:style-name="T5">Q/P/B</text:span></text:p>
          </draw:text-box>
        </draw:frame>
        <draw:custom-shape draw:style-name="gr108" draw:text-style-name="P35" draw:layer="layout" svg:width="0.89cm" svg:height="3.57cm" svg:x="11.331cm" svg:y="4.434cm">
          <text:p text:style-name="P34"><text:span text:style-name="T1">V</text:span></text:p>
          <draw:enhanced-geometry svg:viewBox="0 0 21600 21600" draw:type="rectangle" draw:enhanced-path="M 0 0 L 21600 0 21600 21600 0 21600 0 0 Z N"/>
        </draw:custom-shape>
        <draw:line draw:style-name="gr97" draw:text-style-name="P36" draw:layer="layout" svg:x1="16.001cm" svg:y1="5.445cm" svg:x2="12.211cm" svg:y2="5.445cm">
          <text:p/>
        </draw:line>
        <draw:line draw:style-name="gr96" draw:text-style-name="P36" draw:layer="layout" svg:x1="17.761cm" svg:y1="7.474cm" svg:x2="12.211cm" svg:y2="7.474cm">
          <text:p/>
        </draw:line>
        <draw:custom-shape draw:style-name="gr109" draw:text-style-name="P35" draw:layer="layout" svg:width="0.89cm" svg:height="3.51cm" svg:x="11.331cm" svg:y="12.224cm">
          <text:p text:style-name="P34"><text:span text:style-name="T1">V</text:span></text:p>
          <draw:enhanced-geometry svg:viewBox="0 0 21600 21600" draw:type="rectangle" draw:enhanced-path="M 0 0 L 21600 0 21600 21600 0 21600 0 0 Z N"/>
        </draw:custom-shape>
        <draw:line draw:style-name="gr97" draw:text-style-name="P36" draw:layer="layout" svg:x1="15.961cm" svg:y1="14.744cm" svg:x2="12.264cm" svg:y2="14.744cm">
          <text:p/>
        </draw:line>
        <draw:line draw:style-name="gr96" draw:text-style-name="P36" draw:layer="layout" svg:x1="29.701cm" svg:y1="6.334cm" svg:x2="12.211cm" svg:y2="6.334cm">
          <text:p/>
        </draw:line>
        <draw:custom-shape draw:style-name="gr110" draw:text-style-name="P40" draw:layer="layout" svg:width="1.453cm" svg:height="0.44cm" draw:transform="rotate (1.5707963267949) translate (15.801cm 11.95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97" draw:text-style-name="P36" draw:layer="layout" svg:x1="14.191cm" svg:y1="11.804cm" svg:x2="14.191cm" svg:y2="10.654cm">
          <text:p/>
        </draw:line>
        <draw:line draw:style-name="gr97" draw:text-style-name="P36" draw:layer="layout" svg:x1="15.801cm" svg:y1="11.673cm" svg:x2="14.161cm" svg:y2="11.67cm">
          <text:p/>
        </draw:line>
        <draw:line draw:style-name="gr97" draw:text-style-name="P36" draw:layer="layout" svg:x1="15.821cm" svg:y1="10.806cm" svg:x2="14.201cm" svg:y2="10.801cm">
          <text:p/>
        </draw:line>
        <draw:custom-shape draw:style-name="gr111" draw:text-style-name="P42" draw:layer="layout" svg:width="0.77cm" svg:height="1.2cm" svg:x="14.471cm" svg:y="10.164cm">
          <text:p text:style-name="P34"><text:span text:style-name="T1">V</text:span></text:p>
          <draw:enhanced-geometry svg:viewBox="0 0 21600 21600" draw:type="rectangle" draw:enhanced-path="M 0 0 L 21600 0 21600 21600 0 21600 0 0 Z N"/>
        </draw:custom-shape>
        <draw:line draw:style-name="gr97" draw:text-style-name="P36" draw:layer="layout" svg:x1="16.011cm" svg:y1="14.724cm" svg:x2="16.011cm" svg:y2="11.764cm">
          <text:p/>
        </draw:line>
        <draw:frame draw:style-name="gr112" draw:text-style-name="P44" draw:layer="layout" svg:width="3.869cm" svg:height="0.663cm" svg:x="7.151cm" svg:y="3.884cm">
          <draw:text-box>
            <text:p text:style-name="P43"><text:span text:style-name="T1">PIPELINE 0</text:span></text:p>
          </draw:text-box>
        </draw:frame>
        <draw:frame draw:style-name="gr112" draw:text-style-name="P44" draw:layer="layout" svg:width="3.869cm" svg:height="0.663cm" svg:x="17.551cm" svg:y="3.811cm">
          <draw:text-box>
            <text:p text:style-name="P43"><text:span text:style-name="T1">PIPELINE 1</text:span></text:p>
          </draw:text-box>
        </draw:frame>
        <draw:frame draw:style-name="gr112" draw:text-style-name="P44" draw:layer="layout" svg:width="3.869cm" svg:height="0.663cm" svg:x="27.091cm" svg:y="3.821cm">
          <draw:text-box>
            <text:p text:style-name="P43"><text:span text:style-name="T1">PIPELINE 2</text:span></text:p>
          </draw:text-box>
        </draw:frame>
        <draw:line draw:style-name="gr97" draw:text-style-name="P36" draw:layer="layout" svg:x1="27.761cm" svg:y1="14.083cm" svg:x2="15.561cm" svg:y2="14.061cm">
          <text:p/>
        </draw:line>
        <draw:line draw:style-name="gr97" draw:text-style-name="P36" draw:layer="layout" svg:x1="15.561cm" svg:y1="10.804cm" svg:x2="15.561cm" svg:y2="14.074cm">
          <text:p/>
        </draw:line>
        <draw:custom-shape draw:style-name="gr103" draw:text-style-name="P39" draw:layer="layout" svg:width="0.18cm" svg:height="0.18cm" svg:x="15.481cm" svg:y="1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42" draw:layer="layout" svg:width="0.89cm" svg:height="11.33cm" svg:x="25.961cm" svg:y="4.544cm">
          <text:p text:style-name="P34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14" draw:text-style-name="P46" draw:layer="layout" svg:width="1.22cm" svg:height="10.48cm" svg:x="1.631cm" svg:y="4.474cm">
          <text:p text:style-name="P45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2:44:56.172571262</meta:creation-date>
    <dc:date>2026-04-20T15:26:05.035257000</dc:date>
    <meta:editing-duration>P6DT11H38M12S</meta:editing-duration>
    <meta:editing-cycles>23</meta:editing-cycles>
    <meta:generator>LibreOffice/25.2.4.3$MacOSX_AARCH64 LibreOffice_project/33e196637044ead23f5c3226cde09b47731f7e27</meta:generator>
    <meta:document-statistic meta:object-count="650"/>
  </office:meta>
</office:document-meta>
</file>